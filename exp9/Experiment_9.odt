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8ac66" officeooo:paragraph-rsid="0018ac66"/>
    </style:style>
    <style:style style:name="P2" style:family="paragraph" style:parent-style-name="Text_20_body">
      <style:text-properties officeooo:paragraph-rsid="0018ac66"/>
    </style:style>
    <style:style style:name="P3" style:family="paragraph" style:parent-style-name="Text_20_body">
      <style:paragraph-properties fo:text-align="center" style:justify-single-word="false"/>
      <style:text-properties officeooo:paragraph-rsid="0018ac66"/>
    </style:style>
    <style:style style:name="T1" style:family="text">
      <style:text-properties officeooo:rsid="0018ac6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m</text:h>
      <text:p text:style-name="P2"><text:span text:style-name="T1">To </text:span>synthesize a <text:span text:style-name="T1">discrete-time</text:span> <text:span text:style-name="T1">p</text:span>eriodic square wave using <text:span text:style-name="T1">discrete-time fourier series</text:span> in <text:span text:style-name="T1">MATLAB.</text:span></text:p>
      <text:h text:style-name="P1" text:outline-level="1">Theory</text:h>
      <text:p text:style-name="P3"><draw:frame draw:style-name="fr1" draw:name="Object1" text:anchor-type="as-char" svg:y="-0.566cm" svg:width="2.817cm" svg:height="0.84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7:26:50.332487305</meta:creation-date>
    <dc:date>2026-03-11T17:33:38.182260362</dc:date>
    <meta:editing-duration>PT6M49S</meta:editing-duration>
    <meta:editing-cycles>1</meta:editing-cycles>
    <meta:document-statistic meta:table-count="0" meta:image-count="0" meta:object-count="1" meta:page-count="1" meta:paragraph-count="4" meta:word-count="16" meta:character-count="111" meta:non-whitespace-character-count="99"/>
    <meta:generator>LibreOffice/25.8.4.2$Linux_X86_64 LibreOffice_project/58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underover>
            <mo stretchy="false">∑</mo>
            <mrow>
              <mo stretchy="false">−</mo>
              <mi mathvariant="normal">∞</mi>
            </mrow>
            <mi mathvariant="normal">∞</mi>
          </munderover>
          <msub>
            <mi>C</mi>
            <mi>n</mi>
          </msub>
        </mrow>
      </mrow>
      <msup>
        <mi>e</mi>
        <mi mathvariant="italic">jntω</mi>
      </msup>
    </mrow>
    <annotation encoding="StarMath 5.0">f( t ) = sum from -infinity to infinity C_n e^jntω</annotation>
  </semantics>
</math>
</file>