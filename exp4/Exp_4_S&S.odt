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7CD000003BD8F7BB20F.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13ad57" officeooo:paragraph-rsid="0013ad57"/>
    </style:style>
    <style:style style:name="P2" style:family="paragraph" style:parent-style-name="Text_20_body">
      <style:text-properties officeooo:rsid="0013ad57" officeooo:paragraph-rsid="0013ad57"/>
    </style:style>
    <style:style style:name="P3" style:family="paragraph" style:parent-style-name="Heading_20_1">
      <style:text-properties officeooo:rsid="0013ad57" officeooo:paragraph-rsid="0013ad57"/>
    </style:style>
    <style:style style:name="P4" style:family="paragraph" style:parent-style-name="Text_20_body">
      <style:text-properties officeooo:paragraph-rsid="0013ad57"/>
    </style:style>
    <style:style style:name="P5" style:family="paragraph" style:parent-style-name="Text_20_body">
      <style:paragraph-properties fo:text-align="center" style:justify-single-word="false"/>
      <style:text-properties fo:font-style="normal" officeooo:rsid="0013ad57" officeooo:paragraph-rsid="0013ad57" style:font-style-asian="normal" style:font-style-complex="normal"/>
    </style:style>
    <style:style style:name="P6" style:family="paragraph" style:parent-style-name="Text_20_body">
      <style:paragraph-properties fo:text-align="start" style:justify-single-word="false"/>
      <style:text-properties fo:font-style="normal" officeooo:rsid="00153412" officeooo:paragraph-rsid="00153412" style:font-style-asian="normal" style:font-style-complex="normal"/>
    </style:style>
    <style:style style:name="P7" style:family="paragraph" style:parent-style-name="Text_20_body">
      <style:paragraph-properties fo:text-align="center" style:justify-single-word="false"/>
      <style:text-properties fo:font-style="normal" officeooo:rsid="00153412" officeooo:paragraph-rsid="00153412" style:font-style-asian="normal" style:font-style-complex="normal"/>
    </style:style>
    <style:style style:name="P8" style:family="paragraph" style:parent-style-name="Preformatted_20_Text">
      <style:text-properties fo:font-size="10pt" style:font-size-asian="10pt" style:font-size-complex="10pt"/>
    </style:style>
    <style:style style:name="P9" style:family="paragraph" style:parent-style-name="Preformatted_20_Text">
      <style:text-properties officeooo:rsid="00153412"/>
    </style:style>
    <style:style style:name="P10" style:family="paragraph" style:parent-style-name="Heading_20_1" style:master-page-name="Landscape">
      <style:paragraph-properties style:page-number="auto"/>
    </style:style>
    <style:style style:name="P11" style:family="paragraph" style:parent-style-name="Text_20_body">
      <style:text-properties officeooo:rsid="00167577" officeooo:paragraph-rsid="00167577"/>
    </style:style>
    <style:style style:name="P12" style:family="paragraph" style:parent-style-name="Heading_20_1" style:master-page-name="Standard">
      <style:paragraph-properties style:page-number="auto"/>
      <style:text-properties officeooo:rsid="00167577" officeooo:paragraph-rsid="00167577"/>
    </style:style>
    <style:style style:name="T1" style:family="text">
      <style:text-properties fo:font-style="normal" style:font-style-asian="normal" style:font-style-complex="normal"/>
    </style:style>
    <style:style style:name="T2" style:family="text">
      <style:text-properties fo:color="#000000" loext:opacity="100%" fo:font-family="0" style:font-family-generic="roman" style:font-pitch="variable"/>
    </style:style>
    <style:style style:name="T3" style:family="text">
      <style:text-properties fo:color="#a709f5" loext:opacity="100%" fo:font-family="0" style:font-family-generic="roman" style:font-pitch="variable"/>
    </style:style>
    <style:style style:name="T4" style:family="text">
      <style:text-properties fo:color="#0e00ff" loext:opacity="100%" fo:font-family="0" style:font-family-generic="roman" style:font-pitch="variable"/>
    </style:style>
    <style:style style:name="fr1" style:family="graphic" style:parent-style-name="Formula">
      <style:graphic-properties style:vertical-pos="from-top" draw:ole-draw-aspect="1"/>
    </style:style>
    <style:style style:name="fr2" style:family="graphic" style:parent-style-name="Formula">
      <style:graphic-properties style:vertical-pos="from-top" fo:padding="0.049cm" fo:border="0.06pt solid #ffffff"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4: Signals and Systems</text:p>
      <text:p text:style-name="P2"/>
      <text:h text:style-name="P3" text:outline-level="1">Aim</text:h>
      <text:p text:style-name="P4">Write a MATLAB program to find the odd and even parts of the CT unit step signal and CT unit ramp signal.</text:p>
      <text:h text:style-name="P3" text:outline-level="1">Theory</text:h>
      <text:p text:style-name="P2">We know that any signal in continuous-time can be decomposed to its even and odd parts. We also note that odd and even functions<text:span text:style-name="T1"> can be defined as follows:</text:span></text:p>
      <text:p text:style-name="P5"><draw:frame draw:style-name="fr1" draw:name="Object1" text:anchor-type="as-char" svg:y="-0.388cm" svg:width="4.881cm" svg:height="0.543cm" draw:z-index="0"><draw:object xlink:href="./Object 1" xlink:type="simple" xlink:show="embed" xlink:actuate="onLoad"/><draw:image xlink:href="./ObjectReplacements/Object 1" xlink:type="simple" xlink:show="embed" xlink:actuate="onLoad"/></draw:frame></text:p>
      <text:p text:style-name="P5"><draw:frame draw:style-name="fr1" draw:name="Object2" text:anchor-type="as-char" svg:y="-0.388cm" svg:width="4.972cm" svg:height="0.543cm" draw:z-index="1"><draw:object xlink:href="./Object 2" xlink:type="simple" xlink:show="embed" xlink:actuate="onLoad"/><draw:image xlink:href="./ObjectReplacements/Object 2" xlink:type="simple" xlink:show="embed" xlink:actuate="onLoad"/></draw:frame></text:p>
      <text:p text:style-name="P6">And we also note that:</text:p>
      <text:p text:style-name="P7"><draw:frame draw:style-name="fr1" draw:name="Object3" text:anchor-type="as-char" svg:y="-0.661cm" svg:width="3.104cm" svg:height="1.044cm" draw:z-index="2"><draw:object xlink:href="./Object 3" xlink:type="simple" xlink:show="embed" xlink:actuate="onLoad"/><draw:image xlink:href="./ObjectReplacements/Object 3" xlink:type="simple" xlink:show="embed" xlink:actuate="onLoad"/></draw:frame></text:p>
      <text:p text:style-name="P6">And,</text:p>
      <text:p text:style-name="P7"><draw:frame draw:style-name="fr2" draw:name="Object4" text:anchor-type="as-char" svg:y="-0.713cm" svg:width="3.283cm" svg:height="1.147cm" draw:z-index="3"><draw:object xlink:href="./Object 4" xlink:type="simple" xlink:show="embed" xlink:actuate="onLoad"/><draw:image xlink:href="./ObjectReplacements/Object 4" xlink:type="simple" xlink:show="embed" xlink:actuate="onLoad"/></draw:frame></text:p>
      <text:h text:style-name="Heading_20_1" text:outline-level="1">MATLAB code</text:h>
      <text:p text:style-name="Text_20_body"/>
      <text:p text:style-name="P8">clear;</text:p>
      <text:p text:style-name="P8"><text:span text:style-name="T2">close </text:span><text:span text:style-name="T3">all</text:span><text:span text:style-name="T2">;</text:span></text:p>
      <text:p text:style-name="P8">clc;</text:p>
      <text:p text:style-name="P8"/>
      <text:p text:style-name="P8">%% Unit step functions:</text:p>
      <text:p text:style-name="P8"/>
      <text:p text:style-name="P8">t = -10 : 10e-4 : 10;</text:p>
      <text:p text:style-name="P8">unit_step_signal = zeros(1, 1:length(i));</text:p>
      <text:p text:style-name="P8"/>
      <text:p text:style-name="P8"><text:span text:style-name="T4">for </text:span><text:span text:style-name="T2">i = 1:length(t)</text:span></text:p>
      <text:p text:style-name="P8"><text:span text:style-name="T2"><text:s text:c="4"/></text:span><text:span text:style-name="T4">if </text:span><text:span text:style-name="T2">t(i) &lt; 0</text:span></text:p>
      <text:p text:style-name="P8"><text:s text:c="8"/>unit_step_signal(i) = 0;</text:p>
      <text:p text:style-name="P8"><text:span text:style-name="T2"><text:s text:c="4"/></text:span><text:span text:style-name="T4">elseif </text:span><text:span text:style-name="T2">t(i) == 0</text:span></text:p>
      <text:p text:style-name="P8"><text:s text:c="12"/>unit_step_signal(i) = 1/2;</text:p>
      <text:p text:style-name="P8"><text:span text:style-name="T2"><text:s text:c="4"/></text:span><text:span text:style-name="T4">else </text:span></text:p>
      <text:p text:style-name="P8"><text:s text:c="8"/>unit_step_signal(i) = 1;</text:p>
      <text:p text:style-name="P8"/>
      <text:p text:style-name="P8"><text:span text:style-name="T2"><text:s text:c="4"/></text:span><text:span text:style-name="T4">end</text:span></text:p>
      <text:p text:style-name="P8">end</text:p>
      <text:p text:style-name="P8">len = length(unit_step_signal);</text:p>
      <text:p text:style-name="P8">mid = floor(len/2) + 1;</text:p>
      <text:p text:style-name="P8"/>
      <text:p text:style-name="P8"><text:soft-page-break/>signal_negative_part = unit_step_signal(1:mid-1);</text:p>
      <text:p text:style-name="P8">signal_positive_part = unit_step_signal(mid:end);</text:p>
      <text:p text:style-name="P8"/>
      <text:p text:style-name="P8">reversed_signal = flip(unit_step_signal);</text:p>
      <text:p text:style-name="P8"/>
      <text:p text:style-name="P8">signal_even = (unit_step_signal + reversed_signal) / 2;</text:p>
      <text:p text:style-name="P8">signal_odd = (unit_step_signal - reversed_signal) / 2;</text:p>
      <text:p text:style-name="P8"/>
      <text:p text:style-name="P8">%% Unit Ramp Signal</text:p>
      <text:p text:style-name="P8"/>
      <text:p text:style-name="P8">unit_ramp_signal = zeros(1, 1:length(i));</text:p>
      <text:p text:style-name="P8"/>
      <text:p text:style-name="P8"><text:span text:style-name="T4">for </text:span><text:span text:style-name="T2">i = 1:length(t)</text:span></text:p>
      <text:p text:style-name="P8"><text:span text:style-name="T2"><text:s text:c="4"/></text:span><text:span text:style-name="T4">if </text:span><text:span text:style-name="T2">t(i) &lt; 0</text:span></text:p>
      <text:p text:style-name="P8"><text:s text:c="8"/>unit_ramp_signal(i) = 0;</text:p>
      <text:p text:style-name="P8"><text:span text:style-name="T2"><text:s text:c="4"/></text:span><text:span text:style-name="T4">else </text:span></text:p>
      <text:p text:style-name="P8"><text:s text:c="8"/>unit_ramp_signal(i) = t(i);</text:p>
      <text:p text:style-name="P8"/>
      <text:p text:style-name="P8"><text:span text:style-name="T2"><text:s text:c="4"/></text:span><text:span text:style-name="T4">end</text:span></text:p>
      <text:p text:style-name="P8">end</text:p>
      <text:p text:style-name="P8">len = length(unit_ramp_signal);</text:p>
      <text:p text:style-name="P8">mid = floor(len/2) + 1;</text:p>
      <text:p text:style-name="P8"/>
      <text:p text:style-name="P8">signal_negative_part_ramp = unit_ramp_signal(1:mid-1);</text:p>
      <text:p text:style-name="P8">signal_positive_part_ramp = unit_ramp_signal(mid:end);</text:p>
      <text:p text:style-name="P8"/>
      <text:p text:style-name="P8">reversed_signal_ramp = flip(unit_ramp_signal);</text:p>
      <text:p text:style-name="P8"/>
      <text:p text:style-name="P8">signal_even_ramp = (unit_ramp_signal + reversed_signal_ramp) / 2;</text:p>
      <text:p text:style-name="P8">signal_odd_ramp = (unit_ramp_signal - reversed_signal_ramp) / 2;</text:p>
      <text:p text:style-name="P8"/>
      <text:p text:style-name="P8">%%</text:p>
      <text:p text:style-name="P8"/>
      <text:p text:style-name="P8">figure</text:p>
      <text:p text:style-name="P8">subplot(3,2, 2)</text:p>
      <text:p text:style-name="P8"><text:span text:style-name="T2">plot(t, signal_even, </text:span><text:span text:style-name="T3">'r'</text:span><text:span text:style-name="T2">, LineWidth=3)</text:span></text:p>
      <text:p text:style-name="P8"><text:span text:style-name="T2">title(</text:span><text:span text:style-name="T3">'Even Part of Unit Step Signal'</text:span><text:span text:style-name="T2">)</text:span></text:p>
      <text:p text:style-name="P8"/>
      <text:p text:style-name="P8">subplot(3,2,3)</text:p>
      <text:p text:style-name="P8"><text:span text:style-name="T2">plot(t, signal_odd, </text:span><text:span text:style-name="T3">'r'</text:span><text:span text:style-name="T2">, LineWidth=3)</text:span></text:p>
      <text:p text:style-name="P8"><text:span text:style-name="T2">title(</text:span><text:span text:style-name="T3">'Odd Part of Unit Step Signal'</text:span><text:span text:style-name="T2">)</text:span></text:p>
      <text:p text:style-name="P8"/>
      <text:p text:style-name="P8">subplot(3,2,1)</text:p>
      <text:p text:style-name="P8"><text:span text:style-name="T2">plot(t, unit_step_signal, </text:span><text:span text:style-name="T3">'r'</text:span><text:span text:style-name="T2">, LineWidth=3)</text:span></text:p>
      <text:p text:style-name="P8"><text:span text:style-name="T2">title(</text:span><text:span text:style-name="T3">'Original, Unit Step Signal'</text:span><text:span text:style-name="T2">)</text:span></text:p>
      <text:p text:style-name="P8"/>
      <text:p text:style-name="P8"/>
      <text:p text:style-name="P8">subplot(3,2, 5)</text:p>
      <text:p text:style-name="P8"><text:span text:style-name="T2">plot(t, signal_even_ramp, </text:span><text:span text:style-name="T3">'r'</text:span><text:span text:style-name="T2">, LineWidth=3)</text:span></text:p>
      <text:p text:style-name="P8"><text:span text:style-name="T2">title(</text:span><text:span text:style-name="T3">'Even Part of Unit Ramp Signal'</text:span><text:span text:style-name="T2">)</text:span></text:p>
      <text:p text:style-name="P8"/>
      <text:p text:style-name="P8">subplot(3,2,6)</text:p>
      <text:p text:style-name="P8"><text:span text:style-name="T2">plot(t, signal_odd_ramp, </text:span><text:span text:style-name="T3">'r'</text:span><text:span text:style-name="T2">, LineWidth=3)</text:span></text:p>
      <text:p text:style-name="P8"><text:span text:style-name="T2">title(</text:span><text:span text:style-name="T3">'Odd Part of Unit Ramp Signal'</text:span><text:span text:style-name="T2">)</text:span></text:p>
      <text:p text:style-name="P8"/>
      <text:p text:style-name="P8">subplot(3,2,4)</text:p>
      <text:p text:style-name="P8"><text:span text:style-name="T2">plot(t, unit_ramp_signal, </text:span><text:span text:style-name="T3">'r'</text:span><text:span text:style-name="T2">, LineWidth=3)</text:span></text:p>
      <text:p text:style-name="P8"><text:span text:style-name="T2">title(</text:span><text:span text:style-name="T3">'Original Unit Ramp Signal'</text:span><text:span text:style-name="T2">)</text:span></text:p>
      <text:p text:style-name="P8"/>
      <text:p text:style-name="P9"/>
      <text:h text:style-name="P10" text:outline-level="1">Results</text:h>
      <text:p text:style-name="P11"><draw:frame draw:style-name="fr3" draw:name="Image1" text:anchor-type="char" svg:x="-1.831cm" svg:y="0.489cm" svg:width="29.229cm" svg:height="14.76cm" draw:z-index="4"><draw:image xlink:href="Pictures/10000001000007CD000003BD8F7BB20F.png" xlink:type="simple" xlink:show="embed" xlink:actuate="onLoad" draw:mime-type="image/png"/></draw:frame></text:p>
      <text:h text:style-name="P12" text:outline-level="1">Conclusion</text:h>
      <text:p text:style-name="P11">From this experiment we were able to successfully decompose a continuous-time unit step and unit ramp signal into their even and odd components using their standard formulas. We observe that even parts remain symmetric about the origin whereas the odd parts exhibit asymmetry.</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23:49:28.911427759</meta:creation-date>
    <meta:print-date>2026-01-28T23:18:03.494853580</meta:print-date>
    <meta:printed-by>PDF files</meta:printed-by>
    <dc:date>2026-01-28T23:18:13.199266511</dc:date>
    <meta:editing-duration>PT9S</meta:editing-duration>
    <meta:editing-cycles>1</meta:editing-cycles>
    <meta:generator>LibreOffice/25.8.3.2$Linux_X86_64 LibreOffice_project/580$Build-2</meta:generator>
    <meta:document-statistic meta:table-count="0" meta:image-count="1" meta:object-count="4" meta:page-count="4" meta:paragraph-count="73" meta:word-count="307" meta:character-count="2290" meta:non-whitespace-character-count="1978"/>
  </office:meta>
</office:document-meta>
</file>

<file path=Object 1/content.xml><?xml version="1.0" encoding="utf-8"?>
<math xmlns="http://www.w3.org/1998/Math/MathML" display="block">
  <semantics>
    <mrow>
      <mtext>Even Function:</mtext>
      <msub>
        <mi>f</mi>
        <mi>e</mi>
      </msub>
      <mrow>
        <mrow>
          <mo fence="true" form="prefix" stretchy="false">(</mo>
          <mrow>
            <mi>t</mi>
          </mrow>
          <mo fence="true" form="postfix" stretchy="false">)</mo>
        </mrow>
        <mo stretchy="false">=</mo>
        <mi>f</mi>
      </mrow>
      <mrow>
        <mo fence="true" form="prefix" stretchy="false">(</mo>
        <mrow>
          <mrow>
            <mo stretchy="false">−</mo>
            <mi>t</mi>
          </mrow>
        </mrow>
        <mo fence="true" form="postfix" stretchy="false">)</mo>
      </mrow>
    </mrow>
    <annotation encoding="StarMath 5.0">"Even Function:" f_e(t) = f(-t)
</annotation>
  </semantics>
</math>
</file>

<file path=Object 2/content.xml><?xml version="1.0" encoding="utf-8"?>
<math xmlns="http://www.w3.org/1998/Math/MathML" display="block">
  <semantics>
    <mrow>
      <mtext>Odd Function</mtext>
      <msub>
        <mi>f</mi>
        <mi>o</mi>
      </msub>
      <mrow>
        <mrow>
          <mo fence="true" form="prefix" stretchy="false">(</mo>
          <mrow>
            <mi>t</mi>
          </mrow>
          <mo fence="true" form="postfix" stretchy="false">)</mo>
        </mrow>
        <mo stretchy="false">=</mo>
        <mrow>
          <mo stretchy="false">−</mo>
          <mi>f</mi>
        </mrow>
      </mrow>
      <mrow>
        <mo fence="true" form="prefix" stretchy="false">(</mo>
        <mrow>
          <mrow>
            <mo stretchy="false">−</mo>
            <mi>t</mi>
          </mrow>
        </mrow>
        <mo fence="true" form="postfix" stretchy="false">)</mo>
      </mrow>
    </mrow>
    <annotation encoding="StarMath 5.0">"Odd Function" f_o(t) = -f(-t)</annotation>
  </semantics>
</math>
</file>

<file path=Object 3/content.xml><?xml version="1.0" encoding="utf-8"?>
<math xmlns="http://www.w3.org/1998/Math/MathML" display="block">
  <semantics>
    <mrow>
      <msub>
        <mi>f</mi>
        <mi>e</mi>
      </msub>
      <mo stretchy="false">=</mo>
      <mfrac>
        <mrow>
          <mo fence="true" form="prefix" stretchy="false">(</mo>
          <mrow>
            <mrow>
              <mi>f</mi>
              <mrow>
                <mrow>
                  <mo fence="true" form="prefix" stretchy="false">(</mo>
                  <mrow>
                    <mi>t</mi>
                  </mrow>
                  <mo fence="true" form="postfix" stretchy="false">)</mo>
                </mrow>
                <mo stretchy="false">+</mo>
                <mi>f</mi>
              </mrow>
              <mrow>
                <mo fence="true" form="prefix" stretchy="false">(</mo>
                <mrow>
                  <mrow>
                    <mo stretchy="false">−</mo>
                    <mi>t</mi>
                  </mrow>
                </mrow>
                <mo fence="true" form="postfix" stretchy="false">)</mo>
              </mrow>
            </mrow>
          </mrow>
          <mo fence="true" form="postfix" stretchy="false">)</mo>
        </mrow>
        <mn>2</mn>
      </mfrac>
    </mrow>
    <annotation encoding="StarMath 5.0">f_e = (f(t) + f(-t)) over 2</annotation>
  </semantics>
</math>
</file>

<file path=Object 4/content.xml><?xml version="1.0" encoding="utf-8"?>
<math xmlns="http://www.w3.org/1998/Math/MathML" display="block">
  <semantics>
    <mrow>
      <msub>
        <mi>f</mi>
        <mi>o</mi>
      </msub>
      <mo stretchy="false">=</mo>
      <mfrac>
        <mrow>
          <mo fence="true" form="prefix" stretchy="false">(</mo>
          <mrow>
            <mrow>
              <mi>f</mi>
              <mrow>
                <mrow>
                  <mo fence="true" form="prefix" stretchy="false">(</mo>
                  <mrow>
                    <mi>t</mi>
                  </mrow>
                  <mo fence="true" form="postfix" stretchy="false">)</mo>
                </mrow>
                <mo stretchy="false">−</mo>
                <mi>f</mi>
              </mrow>
              <mrow>
                <mo fence="true" form="prefix" stretchy="false">(</mo>
                <mrow>
                  <mrow>
                    <mo stretchy="false">−</mo>
                    <mi>t</mi>
                  </mrow>
                </mrow>
                <mo fence="true" form="postfix" stretchy="false">)</mo>
              </mrow>
            </mrow>
          </mrow>
          <mo fence="true" form="postfix" stretchy="false">)</mo>
        </mrow>
        <mn>2</mn>
      </mfrac>
    </mrow>
    <annotation encoding="StarMath 5.0">f_o = (f(t) - f(-t)) over 2</annotation>
  </semantics>
</math>
</file>