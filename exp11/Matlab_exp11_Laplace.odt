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50000034A7DAF70EB.png" manifest:media-type="image/png"/>
  <manifest:file-entry manifest:full-path="Pictures/10000001000002EB0000029E8EDD1561.png" manifest:media-type="image/png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139db" officeooo:paragraph-rsid="000139db"/>
    </style:style>
    <style:style style:name="P2" style:family="paragraph" style:parent-style-name="Text_20_body">
      <style:text-properties officeooo:paragraph-rsid="0002276a"/>
    </style:style>
    <style:style style:name="P3" style:family="paragraph" style:parent-style-name="Text_20_body">
      <style:text-properties fo:font-style="normal" officeooo:rsid="0003fe49" officeooo:paragraph-rsid="0003fe49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fo:font-style="normal" officeooo:rsid="0003fe49" officeooo:paragraph-rsid="0003fe49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font-style="normal" officeooo:rsid="00057984" officeooo:paragraph-rsid="00057984" style:font-style-asian="normal" style:font-style-complex="normal"/>
    </style:style>
    <style:style style:name="P6" style:family="paragraph" style:parent-style-name="Heading_20_1">
      <style:text-properties officeooo:rsid="00057984" officeooo:paragraph-rsid="00057984"/>
    </style:style>
    <style:style style:name="P7" style:family="paragraph" style:parent-style-name="Text_20_body">
      <style:text-properties officeooo:paragraph-rsid="00057984"/>
    </style:style>
    <style:style style:name="P8" style:family="paragraph" style:parent-style-name="Heading_20_1" style:master-page-name="Landscape">
      <style:paragraph-properties style:page-number="auto"/>
      <style:text-properties officeooo:rsid="0005c156" officeooo:paragraph-rsid="0005c156"/>
    </style:style>
    <style:style style:name="P9" style:family="paragraph" style:parent-style-name="Text_20_body">
      <style:text-properties officeooo:paragraph-rsid="0005c156"/>
    </style:style>
    <style:style style:name="P10" style:family="paragraph" style:parent-style-name="Heading_20_1" style:master-page-name="Standard">
      <style:paragraph-properties style:page-number="auto"/>
      <style:text-properties officeooo:rsid="0005c156" officeooo:paragraph-rsid="0005c156"/>
    </style:style>
    <style:style style:name="P11" style:family="paragraph" style:parent-style-name="Text_20_body">
      <style:text-properties officeooo:rsid="0005c156" officeooo:paragraph-rsid="0005c156"/>
    </style:style>
    <style:style style:name="T1" style:family="text">
      <style:text-properties officeooo:rsid="000139db"/>
    </style:style>
    <style:style style:name="T2" style:family="text">
      <style:text-properties officeooo:rsid="0002276a"/>
    </style:style>
    <style:style style:name="T3" style:family="text">
      <style:text-properties fo:font-style="italic" officeooo:rsid="0002276a" style:font-style-asian="italic" style:font-style-complex="italic"/>
    </style:style>
    <style:style style:name="T4" style:family="text">
      <style:text-properties fo:font-style="normal" officeooo:rsid="0002276a" style:font-style-asian="normal" style:font-style-complex="normal"/>
    </style:style>
    <style:style style:name="T5" style:family="text">
      <style:text-properties fo:font-style="normal" officeooo:rsid="0003fe49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6804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</text:h>
      <text:p text:style-name="Standard">To find the Laplace transform of a unit <text:span text:style-name="T1">ramp</text:span> signal <text:span text:style-name="T1">using MATLAB and then plot the signal</text:span></text:p>
      <text:h text:style-name="Heading_20_1" text:outline-level="1" text:is-list-header="true">Theory</text:h>
      <text:p text:style-name="P2"><text:span text:style-name="T2">Laplace Transform: The Laplace Transform is an integral transform that converts of time</text:span><text:span text:style-name="T3"> (t)</text:span><text:span text:style-name="T3"> </text:span><text:span text:style-name="T4">into a function of complex frequency </text:span><text:span text:style-name="T3">(s). </text:span><text:span text:style-name="T5">It is used for analyzing time-invarient systems (LTI) which are unstable, or to analyze transient responses or solve differential conditions with initial conditions.</text:span></text:p>
      <text:p text:style-name="P3">The general formula is given by:</text:p>
      <text:p text:style-name="P4"><draw:frame draw:style-name="fr1" draw:name="Object1" text:anchor-type="as-char" svg:y="-0.596cm" svg:width="5.108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In MATLAB, we will sue the inbuilt <text:span text:style-name="T6">laplace() </text:span>function from the functional math toolbox and we will use <text:span text:style-name="T6">syms </text:span>to declare symbolic variables.</text:p>
      <text:h text:style-name="P6" text:outline-level="1">MATLAB Code</text:h>
      <text:p text:style-name="P7"><draw:frame draw:style-name="fr2" draw:name="Image1" text:anchor-type="char" svg:width="17cm" svg:height="15.247cm" draw:z-index="1"><draw:image xlink:href="Pictures/10000001000002EB0000029E8EDD1561.png" xlink:type="simple" xlink:show="embed" xlink:actuate="onLoad" draw:mime-type="image/png"/></draw:frame></text:p>
      <text:h text:style-name="P8" text:outline-level="1">Output</text:h>
      <text:p text:style-name="P9"/>
      <text:p text:style-name="P9"><draw:frame draw:style-name="fr2" draw:name="Image2" text:anchor-type="char" svg:width="27.312cm" svg:height="13.647cm" draw:z-index="2"><draw:image xlink:href="Pictures/10000001000006950000034A7DAF70EB.png" xlink:type="simple" xlink:show="embed" xlink:actuate="onLoad" draw:mime-type="image/png"/></draw:frame></text:p>
      <text:h text:style-name="P10" text:outline-level="1">Conclusion</text:h>
      <text:p text:style-name="P11">We successfully found the Laplace transform of a unit ramp signal, defined as <text:span text:style-name="T6">r(t) = t, </text:span><text:span text:style-name="T7">was successfully determined using MATLAB’s Symbolic Math Toolbox. The computational result yielded (1/s^2). </text:span><text:span text:style-name="T8">We also found how the Laplace transform can be reversed to find the original func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9:41:13.924704373</meta:creation-date>
    <dc:date>2026-04-17T01:21:23.910050775</dc:date>
    <meta:editing-duration>PT2M20S</meta:editing-duration>
    <meta:editing-cycles>1</meta:editing-cycles>
    <meta:document-statistic meta:table-count="0" meta:image-count="2" meta:object-count="1" meta:page-count="3" meta:paragraph-count="11" meta:word-count="140" meta:character-count="876" meta:non-whitespace-character-count="746"/>
    <meta:generator>LibreOffice/25.8.5.2$Linux_X86_64 LibreOffice_project/58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i>ℒ</mi>
      </mrow>
      <mrow>
        <mrow>
          <mo fence="true" form="prefix" stretchy="false">{</mo>
          <mrow>
            <mrow>
              <mi>f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row>
          <munderover>
            <mo stretchy="false">∫</mo>
            <mn>0</mn>
            <mi mathvariant="normal">∞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sup>
        <mi>e</mi>
        <mrow>
          <mo stretchy="false">−</mo>
          <mi mathvariant="italic">st</mi>
        </mrow>
      </msup>
      <mi mathvariant="italic">dt</mi>
    </mrow>
    <annotation encoding="StarMath 5.0">F( s ) = ℒ lbrace f(t) rbrace = int from 0 to infinity f( t ) e^-st dt</annotation>
  </semantics>
</math>
</file>