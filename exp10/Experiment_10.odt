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6C30000034A816D7C32.png" manifest:media-type="image/png"/>
  <manifest:file-entry manifest:full-path="Pictures/10000001000002EB00000482BE8B0DC9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8ac66" officeooo:paragraph-rsid="0018ac66"/>
    </style:style>
    <style:style style:name="P2" style:family="paragraph" style:parent-style-name="Text_20_body">
      <style:text-properties officeooo:paragraph-rsid="0018ac66"/>
    </style:style>
    <style:style style:name="P3" style:family="paragraph" style:parent-style-name="Text_20_body">
      <style:text-properties officeooo:paragraph-rsid="0019d5b8"/>
    </style:style>
    <style:style style:name="P4" style:family="paragraph" style:parent-style-name="Text_20_body">
      <style:text-properties style:text-underline-style="none" officeooo:rsid="001ae8b5" officeooo:paragraph-rsid="001ae8b5"/>
    </style:style>
    <style:style style:name="P5" style:family="paragraph" style:parent-style-name="Text_20_body">
      <style:paragraph-properties fo:text-align="center" style:justify-single-word="false"/>
      <style:text-properties style:text-underline-style="none" officeooo:rsid="001ae8b5" officeooo:paragraph-rsid="0019d5b8"/>
    </style:style>
    <style:style style:name="P6" style:family="paragraph" style:parent-style-name="Text_20_body">
      <style:paragraph-properties fo:text-align="center" style:justify-single-word="false"/>
      <style:text-properties officeooo:paragraph-rsid="0018ac66"/>
    </style:style>
    <style:style style:name="P7" style:family="paragraph" style:parent-style-name="Text_20_body">
      <style:paragraph-properties fo:text-align="start" style:justify-single-word="false"/>
      <style:text-properties officeooo:rsid="001ae8b5" officeooo:paragraph-rsid="001ae8b5"/>
    </style:style>
    <style:style style:name="P8" style:family="paragraph" style:parent-style-name="Text_20_body">
      <style:paragraph-properties fo:text-align="center" style:justify-single-word="false"/>
      <style:text-properties officeooo:rsid="001ae8b5" officeooo:paragraph-rsid="001ae8b5"/>
    </style:style>
    <style:style style:name="P9" style:family="paragraph" style:parent-style-name="Text_20_body">
      <style:paragraph-properties fo:text-align="start" style:justify-single-word="false"/>
      <style:text-properties officeooo:rsid="001ae8b5" officeooo:paragraph-rsid="001c8283"/>
    </style:style>
    <style:style style:name="P10" style:family="paragraph" style:parent-style-name="Text_20_body">
      <style:paragraph-properties fo:text-align="center" style:justify-single-word="false"/>
      <style:text-properties officeooo:paragraph-rsid="001c8283"/>
    </style:style>
    <style:style style:name="P11" style:family="paragraph" style:parent-style-name="Heading_20_1">
      <style:text-properties officeooo:rsid="001c8283" officeooo:paragraph-rsid="001c8283"/>
    </style:style>
    <style:style style:name="P12" style:family="paragraph" style:parent-style-name="Heading_20_1" style:master-page-name="Landscape">
      <style:paragraph-properties style:page-number="auto"/>
      <style:text-properties officeooo:rsid="001c8283" officeooo:paragraph-rsid="001c8283"/>
    </style:style>
    <style:style style:name="P13" style:family="paragraph" style:parent-style-name="Text_20_body">
      <style:text-properties officeooo:paragraph-rsid="001c8283"/>
    </style:style>
    <style:style style:name="P14" style:family="paragraph" style:parent-style-name="Heading_20_1" style:master-page-name="Standard">
      <style:paragraph-properties style:page-number="auto"/>
      <style:text-properties officeooo:rsid="001c8283" officeooo:paragraph-rsid="001c8283"/>
    </style:style>
    <style:style style:name="P15" style:family="paragraph" style:parent-style-name="Text_20_body">
      <style:text-properties officeooo:rsid="001c8283" officeooo:paragraph-rsid="001c8283"/>
    </style:style>
    <style:style style:name="T1" style:family="text">
      <style:text-properties officeooo:rsid="0018ac66"/>
    </style:style>
    <style:style style:name="T2" style:family="text">
      <style:text-properties style:text-underline-style="solid" style:text-underline-width="auto" style:text-underline-color="font-color" officeooo:rsid="0019d5b8"/>
    </style:style>
    <style:style style:name="T3" style:family="text">
      <style:text-properties style:text-underline-style="none" officeooo:rsid="0019d5b8"/>
    </style:style>
    <style:style style:name="T4" style:family="text">
      <style:text-properties style:text-underline-style="none" officeooo:rsid="001ae8b5"/>
    </style:style>
    <style:style style:name="T5" style:family="text">
      <style:text-properties officeooo:rsid="001dc44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m</text:h>
      <text:p text:style-name="P2"><text:span text:style-name="T1">To </text:span>synthesize a <text:span text:style-name="T1">discrete-time</text:span> <text:span text:style-name="T1">p</text:span>eriodic square wave using <text:span text:style-name="T1">discrete-time fourier series</text:span> in <text:span text:style-name="T1">MATLAB.</text:span></text:p>
      <text:h text:style-name="P1" text:outline-level="1">Theory</text:h>
      <text:p text:style-name="P3"><text:span text:style-name="T2">Discrete-Time Fourier Series (DTFS):</text:span><text:span text:style-name="T3"> A discrete-time periodic signal x[n] with fundamental period N can be represented as a DTFS. Unlike the continuous-time case, the DTFS representation is an exact finite summatio</text:span><text:span text:style-name="T4">n &amp; does not exhibit Gibbs phenomenon.</text:span></text:p>
      <text:p text:style-name="P4">The analysis equation is:</text:p>
      <text:p text:style-name="P5"><draw:frame draw:style-name="fr1" draw:name="Object1" text:anchor-type="as-char" svg:y="-0.73cm" svg:width="7.377cm" svg:height="1.1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7">The synthesis equation is:</text:p>
      <text:p text:style-name="P8"><draw:frame draw:style-name="fr1" draw:name="Object2" text:anchor-type="as-char" svg:y="-0.73cm" svg:width="3.231cm" svg:height="1.1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The square wave is defined as:</text:p>
      <text:p text:style-name="P10"><draw:frame draw:style-name="fr1" draw:name="Object3" text:anchor-type="as-char" svg:y="-0.855cm" svg:width="3.955cm" svg:height="1.56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draw:frame draw:style-name="fr2" draw:name="Image1" text:anchor-type="char" svg:x="1.145cm" svg:y="0.893cm" svg:width="15.771cm" svg:height="21.331cm" draw:z-index="3"><draw:image xlink:href="Pictures/10000001000002EB00000482BE8B0DC9.png" xlink:type="simple" xlink:show="embed" xlink:actuate="onLoad" draw:mime-type="image/png"/></draw:frame><text:soft-page-break/>MATLAB Code</text:h>
      <text:h text:style-name="P12" text:outline-level="1">Results</text:h>
      <text:p text:style-name="P13"><draw:frame draw:style-name="fr3" draw:name="Image2" text:anchor-type="char" svg:width="25.7cm" svg:height="14.575cm" draw:z-index="4"><draw:image xlink:href="Pictures/10000001000006C30000034A816D7C32.png" xlink:type="simple" xlink:show="embed" xlink:actuate="onLoad" draw:mime-type="image/png"/></draw:frame></text:p>
      <text:h text:style-name="P14" text:outline-level="1">Conclusion</text:h>
      <text:p text:style-name="P15">We observe that a square wave can be obtained from approximation from a <text:span text:style-name="T5">DTFS to obtain a DT square wave function. We also note that we do not see any over-shoot and under-shoot phenomenon (Gibbs phenomenon).</text:span></text:p>
      <text:p text:style-name="P15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 style:list-style-name="">
      <style:text-properties officeooo:rsid="001c8283" officeooo:paragraph-rsid="001c82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/>
      </style:head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11M22S</meta:editing-duration>
    <meta:editing-cycles>2</meta:editing-cycles>
    <meta:generator>LibreOffice/25.8.4.2$Linux_X86_64 LibreOffice_project/580$Build-2</meta:generator>
    <dc:date>2026-03-11T19:13:11.047083520</dc:date>
    <meta:document-statistic meta:table-count="0" meta:image-count="2" meta:object-count="3" meta:page-count="4" meta:paragraph-count="15" meta:word-count="143" meta:character-count="929" meta:non-whitespace-character-count="794"/>
  </office:meta>
</office:document-meta>
</file>

<file path=Object 1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1</mn>
          <mi>N</mi>
        </mfrac>
      </mrow>
      <mrow>
        <munderover>
          <mo stretchy="false">∑</mo>
          <mrow>
            <mi>n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form="prefix" stretchy="false">[</mo>
        <mrow>
          <mi>n</mi>
        </mrow>
        <mo fence="true" form="postfix" stretchy="false">]</mo>
      </mrow>
      <msup>
        <mi>e</mi>
        <mfrac>
          <mrow>
            <mrow>
              <mo stretchy="false">−</mo>
              <mi>j</mi>
            </mrow>
            <mn>2</mn>
            <mi>π</mi>
            <mi>k</mi>
            <mi>n</mi>
          </mrow>
          <mi>N</mi>
        </mfrac>
      </msup>
      <mi>,</mi>
      <mrow>
        <mi>k</mi>
        <mo stretchy="false">=</mo>
        <mn>0</mn>
      </mrow>
      <mi>,</mi>
      <mn>1</mn>
      <mi>,</mi>
      <mn>2</mn>
      <mi>,</mi>
      <mn>...</mn>
      <mi>,</mi>
      <mrow>
        <mi>N</mi>
        <mo stretchy="false">−</mo>
        <mn>1</mn>
      </mrow>
    </mrow>
    <annotation encoding="StarMath 5.0">a_k = 1 over { N } sum from { n =0 } to { N-1 } x[ n ] e^{{ -j 2 %pi k n  } over N } , k = 0, 1, 2, ..., N-1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a</mi>
            <mi>k</mi>
          </msub>
        </mrow>
      </mrow>
      <msup>
        <mi>e</mi>
        <mrow>
          <mi>j</mi>
          <mfrac>
            <mrow>
              <mn>2</mn>
              <mi>π</mi>
            </mrow>
            <mi>n</mi>
          </mfrac>
          <mi>k</mi>
          <mi>n</mi>
        </mrow>
      </msup>
    </mrow>
    <annotation encoding="StarMath 5.0">x[ n ] = sum from { k =0 } to { N-1 } a_k e^{ j {{2 %pi} over n} k n  }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o stretchy="false">{</mo>
      </mrow>
      <mtable>
        <mtr>
          <mtd>
            <mrow>
              <mn>1</mn>
              <mi>,</mi>
              <mrow>
                <mrow>
                  <mo fence="true" form="prefix" stretchy="true">|</mo>
                  <mrow>
                    <mi>n</mi>
                  </mrow>
                  <mo fence="true" form="postfix" stretchy="true">|</mo>
                </mrow>
                <mo stretchy="false">≤</mo>
                <msub>
                  <mi>N</mi>
                  <mn>1</mn>
                </msub>
              </mrow>
              <mn>0</mn>
            </mrow>
          </mtd>
        </mtr>
        <mtr>
          <mtd>
            <mrow>
              <mn>0</mn>
              <mi>,</mi>
              <mrow>
                <msub>
                  <mi>N</mi>
                  <mn>1</mn>
                </msub>
                <mo stretchy="false">&lt;</mo>
                <mrow>
                  <mo fence="true" form="prefix" stretchy="true">|</mo>
                  <mrow>
                    <mi>n</mi>
                  </mrow>
                  <mo fence="true" form="postfix" stretchy="true">|</mo>
                </mrow>
                <mo stretchy="false">≤</mo>
                <mrow>
                  <mo fence="true" form="prefix" stretchy="false">[</mo>
                  <mrow>
                    <mfrac>
                      <mi>N</mi>
                      <mn>2</mn>
                    </mfrac>
                  </mrow>
                  <mo fence="true" form="postfix" stretchy="false">]</mo>
                </mrow>
              </mrow>
            </mrow>
          </mtd>
        </mtr>
      </mtable>
    </mrow>
    <annotation encoding="StarMath 5.0">x[ n ] = \lbrace stack {
1, abs{n} &lt;= N_1 0
# 0, N_1 &lt; abs{ n } &lt;= [ N over 2 ]
}

</annotation>
  </semantics>
</math>
</file>