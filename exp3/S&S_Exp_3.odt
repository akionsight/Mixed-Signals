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C7000003BD096BABDC.png" manifest:media-type="image/png"/>
  <manifest:file-entry manifest:full-path="Pictures/10000001000007DC000003DE0CD635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style:style>
    <style:style style:name="P2" style:family="paragraph" style:parent-style-name="Standard">
      <style:text-properties style:font-name="Liberation Serif" officeooo:rsid="0009d386" officeooo:paragraph-rsid="000b4a79"/>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paragraph-rsid="000b4a79"/>
    </style:style>
    <style:style style:name="P5" style:family="paragraph" style:parent-style-name="Text_20_body">
      <style:text-properties style:font-name="Liberation Serif" style:text-underline-style="solid" style:text-underline-width="auto" style:text-underline-color="font-color"/>
    </style:style>
    <style:style style:name="P6" style:family="paragraph" style:parent-style-name="Standard">
      <style:text-properties fo:color="#000000" loext:opacity="100%" style:font-name="0" fo:font-size="10pt" style:font-size-asian="10pt"/>
    </style:style>
    <style:style style:name="P7" style:family="paragraph" style:parent-style-name="Standard">
      <style:text-properties style:font-name="0" fo:font-size="10pt" style:font-size-asian="10pt"/>
    </style:style>
    <style:style style:name="P8" style:family="paragraph" style:parent-style-name="Standard">
      <style:text-properties style:font-name="Liberation Serif" style:text-underline-style="none" fo:font-weight="bold" officeooo:rsid="000afe16" style:font-weight-asian="bold" style:font-weight-complex="bold"/>
    </style:style>
    <style:style style:name="P9" style:family="paragraph" style:parent-style-name="Text_20_body">
      <style:text-properties officeooo:paragraph-rsid="000b4a79"/>
    </style:style>
    <style:style style:name="P10" style:family="paragraph" style:parent-style-name="Standard">
      <style:text-properties officeooo:paragraph-rsid="000b4a79"/>
    </style:style>
    <style:style style:name="P11" style:family="paragraph" style:parent-style-name="Heading_20_1" style:master-page-name="Landscape">
      <style:paragraph-properties style:page-number="auto"/>
      <style:text-properties officeooo:paragraph-rsid="000c416b"/>
    </style:style>
    <style:style style:name="P12" style:family="paragraph" style:parent-style-name="Text_20_body">
      <style:text-properties officeooo:paragraph-rsid="000e0990"/>
    </style:style>
    <style:style style:name="P13" style:family="paragraph" style:parent-style-name="Text_20_body">
      <style:text-properties officeooo:paragraph-rsid="000c5df0"/>
    </style:style>
    <style:style style:name="P14" style:family="paragraph" style:parent-style-name="Heading_20_1" style:master-page-name="Standard">
      <style:paragraph-properties style:page-number="auto"/>
      <style:text-properties officeooo:paragraph-rsid="000c5df0"/>
    </style:style>
    <style:style style:name="T1" style:family="text">
      <style:text-properties officeooo:rsid="000d2d25"/>
    </style:style>
    <style:style style:name="T2" style:family="text">
      <style:text-properties officeooo:rsid="000b4a79"/>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0afe16"/>
    </style:style>
    <style:style style:name="T6" style:family="text">
      <style:text-properties style:font-name="0" fo:font-size="10pt" style:font-size-asian="10pt"/>
    </style:style>
    <style:style style:name="T7" style:family="text">
      <style:text-properties fo:color="#000000" loext:opacity="100%" style:font-name="Liberation Mono" fo:font-size="9pt" style:font-size-asian="9pt" style:font-size-complex="9pt"/>
    </style:style>
    <style:style style:name="T8" style:family="text">
      <style:text-properties fo:color="#a709f5" loext:opacity="100%" style:font-name="Liberation Mono" fo:font-size="9pt" style:font-size-asian="9pt" style:font-size-complex="9pt"/>
    </style:style>
    <style:style style:name="T9" style:family="text">
      <style:text-properties style:font-name="Liberation Mono" fo:font-size="9pt" style:font-size-asian="9pt" style:font-size-complex="9pt"/>
    </style:style>
    <style:style style:name="T10" style:family="text">
      <style:text-properties fo:color="#008013" loext:opacity="100%" style:font-name="Liberation Mono" fo:font-size="9pt" style:font-size-asian="9pt" style:font-size-complex="9pt"/>
    </style:style>
    <style:style style:name="T11" style:family="text">
      <style:text-properties fo:color="#0e00ff" loext:opacity="100%" style:font-name="Liberation Mono" fo:font-size="9pt" style:font-size-asian="9pt" style:font-size-complex="9pt"/>
    </style:style>
    <style:style style:name="T12" style:family="text">
      <style:text-properties fo:color="#a709f5" loext:opacity="100%" fo:font-size="7pt" style:font-size-asian="7pt" style:font-size-complex="7pt"/>
    </style:style>
    <style:style style:name="T13" style:family="text">
      <style:text-properties fo:font-size="8pt" style:font-size-asian="8pt" style:font-size-complex="8pt"/>
    </style:style>
    <style:style style:name="T14" style:family="text">
      <style:text-properties style:font-name="Liberation Serif" style:text-underline-style="solid" style:text-underline-width="auto" style:text-underline-color="font-color" officeooo:rsid="000b4a79"/>
    </style:style>
    <style:style style:name="T15" style:family="text">
      <style:text-properties fo:color="#000000" loext:opacity="100%" fo:font-size="9pt" style:text-underline-style="none" officeooo:rsid="000b4a79" style:font-size-asian="9pt" style:font-size-complex="9pt"/>
    </style:style>
    <style:style style:name="T16" style:family="text">
      <style:text-properties fo:color="#a709f5" loext:opacity="100%" fo:font-size="9pt" style:font-size-asian="9pt" style:font-size-complex="9pt"/>
    </style:style>
    <style:style style:name="T17" style:family="text">
      <style:text-properties fo:color="#000000" loext:opacity="100%" fo:font-size="9pt" style:font-size-asian="9pt" style:font-size-complex="9pt"/>
    </style:style>
    <style:style style:name="T18" style:family="text">
      <style:text-properties fo:font-size="9pt" style:font-size-asian="9pt" style:font-size-complex="9pt"/>
    </style:style>
    <style:style style:name="T19" style:family="text">
      <style:text-properties fo:font-size="7pt" style:font-size-asian="7pt" style:font-size-complex="7pt"/>
    </style:style>
    <style:style style:name="T20" style:family="text">
      <style:text-properties fo:font-size="7pt" style:text-underline-style="solid" style:text-underline-width="auto" style:text-underline-color="font-color" officeooo:rsid="000b4a79" style:font-size-asian="7pt" style:font-size-complex="7pt"/>
    </style:style>
    <style:style style:name="T21" style:family="text">
      <style:text-properties style:font-name="Liberation Sans"/>
    </style:style>
    <style:style style:name="T22" style:family="text">
      <style:text-properties style:font-name="Liberation Sans" officeooo:rsid="000e0990"/>
    </style:style>
    <style:style style:name="T23" style:family="text">
      <style:text-properties style:font-name="Liberation Serif" style:text-underline-style="solid" style:text-underline-width="auto" style:text-underline-color="font-color" officeooo:rsid="000e0990"/>
    </style:style>
    <style:style style:name="T24" style:family="text">
      <style:text-properties style:font-name="Liberation Serif" officeooo:rsid="000c5df0"/>
    </style:style>
    <style:style style:name="T25" style:family="text">
      <style:text-properties style:font-name="Liberation Serif" style:text-underline-style="solid" style:text-underline-width="auto" style:text-underline-color="font-color" officeooo:rsid="000c5df0"/>
    </style:style>
    <style:style style:name="T26" style:family="text">
      <style:text-properties style:font-name="Liberation Serif" style:text-underline-style="none" officeooo:rsid="000c5df0"/>
    </style:style>
    <style:style style:name="T27" style:family="text">
      <style:text-properties style:font-name="Liberation Sans" officeooo:rsid="000c5d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im</text:span>:</text:h>
      <text:p text:style-name="P2">Write a MATLAB program to plot f(t-0.2), f(t+0.2), f(2t), f(t/2) and f(-t) for f(t)=sin(2×pi×t) and f(t) as a unit step signal.</text:p>
      <text:h text:style-name="P1" text:outline-level="1" text:is-list-header="true">T<text:span text:style-name="T2">h</text:span>eory: </text:h>
      <text:p text:style-name="P3"><text:span text:style-name="T3">Time Shifting</text:span>:<text:span text:style-name="T4"> Time shifting <text:s/>replaces t with t-tₒ. <text:s/>Here, <text:s/>tₒ is postive if we must to right-shift the signal on the time axis and <text:s/>tₒ is negative if we must left-shift the signal on the time axis. It is important to note that time shifting preserves shape, frequency and symmetry of the signal.</text:span></text:p>
      <text:p text:style-name="P3"><text:span text:style-name="T3">Time Scaling</text:span>:<text:span text:style-name="T4"> Time scaling is represented by replacing t with </text:span><text:span text:style-name="T5">αt where α &gt; 1 compresses (or signal becomes faster) and 0 &lt; α &lt; 1 expands (or signal becomes slower). In time scaling, the frequency of the signal is altered.</text:span></text:p>
      <text:p text:style-name="P3"><text:span text:style-name="T3">Time Reversal</text:span>:<text:span text:style-name="T4"> In time reversal, the signal gets mirrored about the y axis. The frequency and symmetry of the signal are not affected. </text:span></text:p>
      <text:p text:style-name="P4">It is also important to note that none of these operations bring about any alterations to the amplitude axis.</text:p>
      <text:h text:style-name="P1" text:outline-level="1">MATLAB Code:</text:h>
      <text:p text:style-name="P5">For Unit Step Signal &amp; Derivations:</text:p>
      <text:p text:style-name="Standard" loext:marker-style-name="T6"><text:span text:style-name="Source_20_Text"><text:span text:style-name="T7">clear </text:span></text:span><text:span text:style-name="Source_20_Text"><text:span text:style-name="T8">all</text:span></text:span><text:span text:style-name="Source_20_Text"><text:span text:style-name="T7">;</text:span></text:span></text:p>
      <text:p text:style-name="Standard" loext:marker-style-name="T6"><text:span text:style-name="Source_20_Text"><text:span text:style-name="T7">close </text:span></text:span><text:span text:style-name="Source_20_Text"><text:span text:style-name="T8">all</text:span></text:span><text:span text:style-name="Source_20_Text"><text:span text:style-name="T7">;</text:span></text:span></text:p>
      <text:p text:style-name="P6" loext:marker-style-name="T6"><text:span text:style-name="Source_20_Text"><text:span text:style-name="T9">clc;</text:span></text:span></text:p>
      <text:p text:style-name="Standard" loext:marker-style-name="T6"><text:span text:style-name="Source_20_Text"><text:span text:style-name="T10">%% First We will write unit step signal</text:span></text:span></text:p>
      <text:p text:style-name="P7" loext:marker-style-name="T6"><text:span text:style-name="Source_20_Text"><text:span text:style-name="T9"/></text:span></text:p>
      <text:p text:style-name="Standard" loext:marker-style-name="T6"><text:span text:style-name="Source_20_Text"><text:span text:style-name="T7">t = -1 : 10^-3 : 1;</text:span></text:span></text:p>
      <text:p text:style-name="P7" loext:marker-style-name="T6"><text:span text:style-name="Source_20_Text"><text:span text:style-name="T9"/></text:span></text:p>
      <text:p text:style-name="Standard" loext:marker-style-name="T6"><text:span text:style-name="Source_20_Text"><text:span text:style-name="T7">m1 = zeros(1, length(t));</text:span></text:span></text:p>
      <text:p text:style-name="P7" loext:marker-style-name="T6"><text:span text:style-name="Source_20_Text"><text:span text:style-name="T9"/></text:span></text:p>
      <text:p text:style-name="P7" loext:marker-style-name="T6"><text:span text:style-name="Source_20_Text"><text:span text:style-name="T9"/></text:span></text:p>
      <text:p text:style-name="Standard" loext:marker-style-name="T6"><text:span text:style-name="Source_20_Text"><text:span text:style-name="T7">u = zeros(1, length(t));</text:span></text:span></text:p>
      <text:p text:style-name="P7" loext:marker-style-name="T6"><text:span text:style-name="Source_20_Text"><text:span text:style-name="T9"/></text:span></text:p>
      <text:p text:style-name="Standard" loext:marker-style-name="T6"><text:span text:style-name="Source_20_Text"><text:span text:style-name="T7">shift1 = -0.2;</text:span></text:span></text:p>
      <text:p text:style-name="Standard" loext:marker-style-name="T6"><text:span text:style-name="Source_20_Text"><text:span text:style-name="T7">shift2 = 0.2;</text:span></text:span></text:p>
      <text:p text:style-name="Standard" loext:marker-style-name="T6"><text:span text:style-name="Source_20_Text"><text:span text:style-name="T7">shift_a = 2;</text:span></text:span></text:p>
      <text:p text:style-name="Standard" loext:marker-style-name="T6"><text:span text:style-name="Source_20_Text"><text:span text:style-name="T7">shift_b = 1/2;</text:span></text:span></text:p>
      <text:p text:style-name="Standard" loext:marker-style-name="T6"><text:span text:style-name="Source_20_Text"><text:span text:style-name="T7">shift_c = -1;</text:span></text:span></text:p>
      <text:p text:style-name="P7" loext:marker-style-name="T6"><text:span text:style-name="Source_20_Text"><text:span text:style-name="T9"/></text:span></text:p>
      <text:p text:style-name="P7" loext:marker-style-name="T6"><text:span text:style-name="Source_20_Text"><text:span text:style-name="T9"/></text:span></text:p>
      <text:p text:style-name="Standard" loext:marker-style-name="T6"><text:span text:style-name="Source_20_Text"><text:span text:style-name="T11">for </text:span></text:span><text:span text:style-name="Source_20_Text"><text:span text:style-name="T7">i = 1:length(t)</text:span></text:span></text:p>
      <text:p text:style-name="P7" loext:marker-style-name="T6"><text:span text:style-name="Source_20_Text"><text:span text:style-name="T9"/></text:span></text:p>
      <text:p text:style-name="Standard" loext:marker-style-name="T6"><text:span text:style-name="Source_20_Text"><text:span text:style-name="T7"><text:s text:c="4"/></text:span></text:span><text:span text:style-name="Source_20_Text"><text:span text:style-name="T11">if </text:span></text:span><text:span text:style-name="Source_20_Text"><text:span text:style-name="T7">t(i) &gt; 0</text:span></text:span></text:p>
      <text:p text:style-name="Standard" loext:marker-style-name="T6"><text:span text:style-name="Source_20_Text"><text:span text:style-name="T7"><text:s text:c="8"/>u(i) = 1;</text:span></text:span></text:p>
      <text:p text:style-name="Standard" loext:marker-style-name="T6"><text:span text:style-name="Source_20_Text"><text:span text:style-name="T7"><text:s text:c="4"/></text:span></text:span><text:span text:style-name="Source_20_Text"><text:span text:style-name="T11">elseif </text:span></text:span><text:span text:style-name="Source_20_Text"><text:span text:style-name="T7">t(i) == 0</text:span></text:span></text:p>
      <text:p text:style-name="Standard" loext:marker-style-name="T6"><text:span text:style-name="Source_20_Text"><text:span text:style-name="T7"><text:s text:c="8"/>u(i) = 1/2;</text:span></text:span></text:p>
      <text:p text:style-name="Standard" loext:marker-style-name="T6"><text:span text:style-name="Source_20_Text"><text:span text:style-name="T7"><text:s text:c="4"/></text:span></text:span><text:span text:style-name="Source_20_Text"><text:span text:style-name="T11">else</text:span></text:span></text:p>
      <text:p text:style-name="Standard" loext:marker-style-name="T6"><text:span text:style-name="Source_20_Text"><text:span text:style-name="T7"><text:s text:c="8"/>u(i) = 0;</text:span></text:span></text:p>
      <text:p text:style-name="Standard" loext:marker-style-name="T6"><text:span text:style-name="Source_20_Text"><text:span text:style-name="T7"><text:s text:c="4"/></text:span></text:span><text:span text:style-name="Source_20_Text"><text:span text:style-name="T11">end</text:span></text:span></text:p>
      <text:p text:style-name="Standard" loext:marker-style-name="T6"><text:span text:style-name="Source_20_Text"><text:span text:style-name="T11">end</text:span></text:span></text:p>
      <text:p text:style-name="P7" loext:marker-style-name="T6"><text:span text:style-name="Source_20_Text"><text:span text:style-name="T9"/></text:span></text:p>
      <text:p text:style-name="Standard" loext:marker-style-name="T6"><text:span text:style-name="Source_20_Text"><text:span text:style-name="T10">%% Now we will apply shifts</text:span></text:span></text:p>
      <text:p text:style-name="P7" loext:marker-style-name="T6"><text:span text:style-name="Source_20_Text"><text:span text:style-name="T9"/></text:span></text:p>
      <text:p text:style-name="P7" loext:marker-style-name="T6"><text:span text:style-name="Source_20_Text"><text:span text:style-name="T9"/></text:span></text:p>
      <text:p text:style-name="Standard" loext:marker-style-name="T6"><text:span text:style-name="Source_20_Text"><text:span text:style-name="T11">for </text:span></text:span><text:span text:style-name="Source_20_Text"><text:span text:style-name="T7">i = 1:length(t)</text:span></text:span></text:p>
      <text:p text:style-name="P7" loext:marker-style-name="T6"><text:span text:style-name="Source_20_Text"><text:span text:style-name="T9"/></text:span></text:p>
      <text:p text:style-name="Standard" loext:marker-style-name="T6"><text:span text:style-name="Source_20_Text"><text:span text:style-name="T7"><text:s text:c="4"/></text:span></text:span><text:span text:style-name="Source_20_Text"><text:span text:style-name="T11">if </text:span></text:span><text:span text:style-name="Source_20_Text"><text:span text:style-name="T7">t(i) &gt; -shift1</text:span></text:span></text:p>
      <text:p text:style-name="Standard" loext:marker-style-name="T6"><text:soft-page-break/><text:span text:style-name="Source_20_Text"><text:span text:style-name="T7"><text:s text:c="8"/>m1(i) = 1;</text:span></text:span></text:p>
      <text:p text:style-name="Standard" loext:marker-style-name="T6"><text:span text:style-name="Source_20_Text"><text:span text:style-name="T7"><text:s text:c="4"/></text:span></text:span><text:span text:style-name="Source_20_Text"><text:span text:style-name="T11">elseif </text:span></text:span><text:span text:style-name="Source_20_Text"><text:span text:style-name="T7">t(i) == -shift1</text:span></text:span></text:p>
      <text:p text:style-name="Standard" loext:marker-style-name="T6"><text:span text:style-name="Source_20_Text"><text:span text:style-name="T7"><text:s text:c="8"/>m1(i) = 1/2;</text:span></text:span></text:p>
      <text:p text:style-name="Standard" loext:marker-style-name="T6"><text:span text:style-name="Source_20_Text"><text:span text:style-name="T7"><text:s text:c="4"/></text:span></text:span><text:span text:style-name="Source_20_Text"><text:span text:style-name="T11">else</text:span></text:span></text:p>
      <text:p text:style-name="Standard" loext:marker-style-name="T6"><text:span text:style-name="Source_20_Text"><text:span text:style-name="T7"><text:s text:c="8"/>m1(i) = 0;</text:span></text:span></text:p>
      <text:p text:style-name="Standard" loext:marker-style-name="T6"><text:span text:style-name="Source_20_Text"><text:span text:style-name="T7"><text:s text:c="4"/></text:span></text:span><text:span text:style-name="Source_20_Text"><text:span text:style-name="T11">end</text:span></text:span></text:p>
      <text:p text:style-name="Standard" loext:marker-style-name="T6"><text:span text:style-name="Source_20_Text"><text:span text:style-name="T11">end</text:span></text:span></text:p>
      <text:p text:style-name="P7" loext:marker-style-name="T6"><text:span text:style-name="Source_20_Text"><text:span text:style-name="T9"/></text:span></text:p>
      <text:p text:style-name="Standard" loext:marker-style-name="T6"><text:span text:style-name="Source_20_Text"><text:span text:style-name="T11">for </text:span></text:span><text:span text:style-name="Source_20_Text"><text:span text:style-name="T7">i = 1:length(t)</text:span></text:span></text:p>
      <text:p text:style-name="P7" loext:marker-style-name="T6"><text:span text:style-name="Source_20_Text"><text:span text:style-name="T9"/></text:span></text:p>
      <text:p text:style-name="Standard" loext:marker-style-name="T6"><text:span text:style-name="Source_20_Text"><text:span text:style-name="T7"><text:s text:c="4"/></text:span></text:span><text:span text:style-name="Source_20_Text"><text:span text:style-name="T11">if </text:span></text:span><text:span text:style-name="Source_20_Text"><text:span text:style-name="T7">t(i) &gt; -shift2</text:span></text:span></text:p>
      <text:p text:style-name="Standard" loext:marker-style-name="T6"><text:span text:style-name="Source_20_Text"><text:span text:style-name="T7"><text:s text:c="8"/>m2(i) = 1;</text:span></text:span></text:p>
      <text:p text:style-name="Standard" loext:marker-style-name="T6"><text:span text:style-name="Source_20_Text"><text:span text:style-name="T7"><text:s text:c="4"/></text:span></text:span><text:span text:style-name="Source_20_Text"><text:span text:style-name="T11">elseif </text:span></text:span><text:span text:style-name="Source_20_Text"><text:span text:style-name="T7">t(i) == -shift2</text:span></text:span></text:p>
      <text:p text:style-name="Standard" loext:marker-style-name="T6"><text:span text:style-name="Source_20_Text"><text:span text:style-name="T7"><text:s text:c="8"/>m2(i) = 1/2;</text:span></text:span></text:p>
      <text:p text:style-name="Standard" loext:marker-style-name="T6"><text:span text:style-name="Source_20_Text"><text:span text:style-name="T7"><text:s text:c="4"/></text:span></text:span><text:span text:style-name="Source_20_Text"><text:span text:style-name="T11">else</text:span></text:span></text:p>
      <text:p text:style-name="Standard" loext:marker-style-name="T6"><text:span text:style-name="Source_20_Text"><text:span text:style-name="T7"><text:s text:c="8"/>m2(i) = 0;</text:span></text:span></text:p>
      <text:p text:style-name="Standard" loext:marker-style-name="T6"><text:span text:style-name="Source_20_Text"><text:span text:style-name="T7"><text:s text:c="4"/></text:span></text:span><text:span text:style-name="Source_20_Text"><text:span text:style-name="T11">end</text:span></text:span></text:p>
      <text:p text:style-name="Standard" loext:marker-style-name="T6"><text:span text:style-name="Source_20_Text"><text:span text:style-name="T11">end</text:span></text:span></text:p>
      <text:p text:style-name="P7" loext:marker-style-name="T6"><text:span text:style-name="Source_20_Text"><text:span text:style-name="T9"/></text:span></text:p>
      <text:p text:style-name="Standard" loext:marker-style-name="T6"><text:span text:style-name="Source_20_Text"><text:span text:style-name="T11">for </text:span></text:span><text:span text:style-name="Source_20_Text"><text:span text:style-name="T7">i = 1:length(t)</text:span></text:span></text:p>
      <text:p text:style-name="P7" loext:marker-style-name="T6"><text:span text:style-name="Source_20_Text"><text:span text:style-name="T9"/></text:span></text:p>
      <text:p text:style-name="Standard" loext:marker-style-name="T6"><text:span text:style-name="Source_20_Text"><text:span text:style-name="T7"><text:s text:c="4"/></text:span></text:span><text:span text:style-name="Source_20_Text"><text:span text:style-name="T11">if </text:span></text:span><text:span text:style-name="Source_20_Text"><text:span text:style-name="T7">t(i) &lt; 0</text:span></text:span></text:p>
      <text:p text:style-name="Standard" loext:marker-style-name="T6"><text:span text:style-name="Source_20_Text"><text:span text:style-name="T7"><text:s text:c="8"/>m3(i) = 1;</text:span></text:span></text:p>
      <text:p text:style-name="Standard" loext:marker-style-name="T6"><text:span text:style-name="Source_20_Text"><text:span text:style-name="T7"><text:s text:c="4"/></text:span></text:span><text:span text:style-name="Source_20_Text"><text:span text:style-name="T11">elseif </text:span></text:span><text:span text:style-name="Source_20_Text"><text:span text:style-name="T7">t(i) == 0</text:span></text:span></text:p>
      <text:p text:style-name="Standard" loext:marker-style-name="T6"><text:span text:style-name="Source_20_Text"><text:span text:style-name="T7"><text:s text:c="8"/>m3(i) = 1/2;</text:span></text:span></text:p>
      <text:p text:style-name="Standard" loext:marker-style-name="T6"><text:span text:style-name="Source_20_Text"><text:span text:style-name="T7"><text:s text:c="4"/></text:span></text:span><text:span text:style-name="Source_20_Text"><text:span text:style-name="T11">else</text:span></text:span></text:p>
      <text:p text:style-name="Standard" loext:marker-style-name="T6"><text:span text:style-name="Source_20_Text"><text:span text:style-name="T7"><text:s text:c="8"/>m3(i) = 0;</text:span></text:span></text:p>
      <text:p text:style-name="Standard" loext:marker-style-name="T6"><text:span text:style-name="Source_20_Text"><text:span text:style-name="T7"><text:s text:c="4"/></text:span></text:span><text:span text:style-name="Source_20_Text"><text:span text:style-name="T11">end</text:span></text:span></text:p>
      <text:p text:style-name="P7" loext:marker-style-name="T6"><text:span text:style-name="Source_20_Text"><text:span text:style-name="T9"/></text:span></text:p>
      <text:p text:style-name="Standard" loext:marker-style-name="T6"><text:span text:style-name="Source_20_Text"><text:span text:style-name="T11">end</text:span></text:span></text:p>
      <text:p text:style-name="P7" loext:marker-style-name="T6"><text:span text:style-name="Source_20_Text"><text:span text:style-name="T9"/></text:span></text:p>
      <text:p text:style-name="P7" loext:marker-style-name="T6"><text:span text:style-name="Source_20_Text"><text:span text:style-name="T9"/></text:span></text:p>
      <text:p text:style-name="P7" loext:marker-style-name="T6"><text:span text:style-name="Source_20_Text"><text:span text:style-name="T9"/></text:span></text:p>
      <text:p text:style-name="Standard" loext:marker-style-name="T6"><text:span text:style-name="Source_20_Text"><text:span text:style-name="T7">figure;</text:span></text:span></text:p>
      <text:p text:style-name="P7" loext:marker-style-name="T6"><text:span text:style-name="Source_20_Text"><text:span text:style-name="T9"/></text:span></text:p>
      <text:p text:style-name="Standard" loext:marker-style-name="T6"><text:span text:style-name="Source_20_Text"><text:span text:style-name="T7">subplot(3,2,1)</text:span></text:span></text:p>
      <text:p text:style-name="Standard" loext:marker-style-name="T6"><text:span text:style-name="Source_20_Text"><text:span text:style-name="T7">plot(t, u,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Original Signal'</text:span></text:span><text:span text:style-name="Source_20_Text"><text:span text:style-name="T7">)</text:span></text:span></text:p>
      <text:p text:style-name="Standard" loext:marker-style-name="T6"><text:span text:style-name="Source_20_Text"><text:span text:style-name="T7">grid </text:span></text:span><text:span text:style-name="Source_20_Text"><text:span text:style-name="T8">on</text:span></text:span></text:p>
      <text:p text:style-name="P7" loext:marker-style-name="T6"><text:span text:style-name="Source_20_Text"><text:span text:style-name="T9"/></text:span></text:p>
      <text:p text:style-name="Standard" loext:marker-style-name="T6"><text:span text:style-name="Source_20_Text"><text:span text:style-name="T7">subplot(3,2,2)</text:span></text:span></text:p>
      <text:p text:style-name="P7" loext:marker-style-name="T6"><text:span text:style-name="Source_20_Text"><text:span text:style-name="T9"/></text:span></text:p>
      <text:p text:style-name="Standard" loext:marker-style-name="T6"><text:span text:style-name="Source_20_Text"><text:span text:style-name="T7">plot(t, u, </text:span></text:span><text:span text:style-name="Source_20_Text"><text:span text:style-name="T8">'m--'</text:span></text:span><text:span text:style-name="Source_20_Text"><text:span text:style-name="T7">, LineWidth=2)</text:span></text:span></text:p>
      <text:p text:style-name="Standard" loext:marker-style-name="T6"><text:span text:style-name="Source_20_Text"><text:span text:style-name="T7">hold </text:span></text:span><text:span text:style-name="Source_20_Text"><text:span text:style-name="T8">on</text:span></text:span></text:p>
      <text:p text:style-name="Standard" loext:marker-style-name="T6"><text:span text:style-name="Source_20_Text"><text:span text:style-name="T7">plot(t, m1,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hold </text:span></text:span><text:span text:style-name="Source_20_Text"><text:span text:style-name="T8">off</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Right Shift'</text:span></text:span><text:span text:style-name="Source_20_Text"><text:span text:style-name="T7">)</text:span></text:span></text:p>
      <text:p text:style-name="Standard" loext:marker-style-name="T6"><text:span text:style-name="Source_20_Text"><text:span text:style-name="T7">grid </text:span></text:span><text:span text:style-name="Source_20_Text"><text:span text:style-name="T8">on</text:span></text:span></text:p>
      <text:p text:style-name="P7" loext:marker-style-name="T6"><text:span text:style-name="Source_20_Text"><text:span text:style-name="T9"/></text:span></text:p>
      <text:p text:style-name="Standard" loext:marker-style-name="T6"><text:span text:style-name="Source_20_Text"><text:span text:style-name="T7">subplot(3,2,3)</text:span></text:span></text:p>
      <text:p text:style-name="Standard" loext:marker-style-name="T6"><text:span text:style-name="Source_20_Text"><text:span text:style-name="T7">plot(t, u, </text:span></text:span><text:span text:style-name="Source_20_Text"><text:span text:style-name="T8">'m--'</text:span></text:span><text:span text:style-name="Source_20_Text"><text:span text:style-name="T7">, LineWidth=2)</text:span></text:span></text:p>
      <text:p text:style-name="Standard" loext:marker-style-name="T6"><text:span text:style-name="Source_20_Text"><text:span text:style-name="T7">hold </text:span></text:span><text:span text:style-name="Source_20_Text"><text:span text:style-name="T8">on</text:span></text:span></text:p>
      <text:p text:style-name="Standard" loext:marker-style-name="T6"><text:span text:style-name="Source_20_Text"><text:span text:style-name="T7">plot(t, m2,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hold </text:span></text:span><text:span text:style-name="Source_20_Text"><text:span text:style-name="T8">off</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Left Shift'</text:span></text:span><text:span text:style-name="Source_20_Text"><text:span text:style-name="T7">)</text:span></text:span></text:p>
      <text:p text:style-name="Standard" loext:marker-style-name="T6"><text:span text:style-name="Source_20_Text"><text:span text:style-name="T7">grid </text:span></text:span><text:span text:style-name="Source_20_Text"><text:span text:style-name="T8">on</text:span></text:span></text:p>
      <text:p text:style-name="P7" loext:marker-style-name="T6"><text:span text:style-name="Source_20_Text"><text:span text:style-name="T9"/></text:span></text:p>
      <text:p text:style-name="Standard" loext:marker-style-name="T6"><text:span text:style-name="Source_20_Text"><text:span text:style-name="T7">subplot(3,2,4)</text:span></text:span></text:p>
      <text:p text:style-name="Standard" loext:marker-style-name="T6"><text:span text:style-name="Source_20_Text"><text:span text:style-name="T7">plot(t, u, </text:span></text:span><text:span text:style-name="Source_20_Text"><text:span text:style-name="T8">'m--'</text:span></text:span><text:span text:style-name="Source_20_Text"><text:span text:style-name="T7">, LineWidth=2)</text:span></text:span></text:p>
      <text:p text:style-name="Standard" loext:marker-style-name="T6"><text:span text:style-name="Source_20_Text"><text:span text:style-name="T7">hold </text:span></text:span><text:span text:style-name="Source_20_Text"><text:span text:style-name="T8">on</text:span></text:span></text:p>
      <text:p text:style-name="Standard" loext:marker-style-name="T6"><text:span text:style-name="Source_20_Text"><text:span text:style-name="T7">plot(t, m3,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hold </text:span></text:span><text:span text:style-name="Source_20_Text"><text:span text:style-name="T8">off</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Signal Reversal'</text:span></text:span><text:span text:style-name="Source_20_Text"><text:span text:style-name="T7">)</text:span></text:span></text:p>
      <text:p text:style-name="Standard" loext:marker-style-name="T6"><text:soft-page-break/><text:span text:style-name="Source_20_Text"><text:span text:style-name="T7">grid </text:span></text:span><text:span text:style-name="Source_20_Text"><text:span text:style-name="T8">on</text:span></text:span></text:p>
      <text:p text:style-name="P7" loext:marker-style-name="T6"><text:span text:style-name="Source_20_Text"><text:span text:style-name="T9"/></text:span></text:p>
      <text:p text:style-name="Standard" loext:marker-style-name="T6"><text:span text:style-name="Source_20_Text"><text:span text:style-name="T7">subplot(3,2,5)</text:span></text:span></text:p>
      <text:p text:style-name="Standard" loext:marker-style-name="T6"><text:span text:style-name="Source_20_Text"><text:span text:style-name="T7">plot(t, u, </text:span></text:span><text:span text:style-name="Source_20_Text"><text:span text:style-name="T8">'m--'</text:span></text:span><text:span text:style-name="Source_20_Text"><text:span text:style-name="T7">, LineWidth=2)</text:span></text:span></text:p>
      <text:p text:style-name="Standard" loext:marker-style-name="T6"><text:span text:style-name="Source_20_Text"><text:span text:style-name="T7">hold </text:span></text:span><text:span text:style-name="Source_20_Text"><text:span text:style-name="T8">on</text:span></text:span></text:p>
      <text:p text:style-name="Standard" loext:marker-style-name="T6"><text:span text:style-name="Source_20_Text"><text:span text:style-name="T7">plot(t, u,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hold </text:span></text:span><text:span text:style-name="Source_20_Text"><text:span text:style-name="T8">off</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Signal Doubled on time axis'</text:span></text:span><text:span text:style-name="Source_20_Text"><text:span text:style-name="T7">)</text:span></text:span></text:p>
      <text:p text:style-name="Standard" loext:marker-style-name="T6"><text:span text:style-name="Source_20_Text"><text:span text:style-name="T7">grid </text:span></text:span><text:span text:style-name="Source_20_Text"><text:span text:style-name="T8">on</text:span></text:span></text:p>
      <text:p text:style-name="P7" loext:marker-style-name="T6"><text:span text:style-name="Source_20_Text"><text:span text:style-name="T9"/></text:span></text:p>
      <text:p text:style-name="P7" loext:marker-style-name="T6"><text:span text:style-name="Source_20_Text"><text:span text:style-name="T9"/></text:span></text:p>
      <text:p text:style-name="Standard" loext:marker-style-name="T6"><text:span text:style-name="Source_20_Text"><text:span text:style-name="T7">subplot(3,2,6)</text:span></text:span></text:p>
      <text:p text:style-name="Standard" loext:marker-style-name="T6"><text:span text:style-name="Source_20_Text"><text:span text:style-name="T7">plot(t, u, </text:span></text:span><text:span text:style-name="Source_20_Text"><text:span text:style-name="T8">'m--'</text:span></text:span><text:span text:style-name="Source_20_Text"><text:span text:style-name="T7">, LineWidth=2)</text:span></text:span></text:p>
      <text:p text:style-name="Standard" loext:marker-style-name="T6"><text:span text:style-name="Source_20_Text"><text:span text:style-name="T7">hold </text:span></text:span><text:span text:style-name="Source_20_Text"><text:span text:style-name="T8">on</text:span></text:span></text:p>
      <text:p text:style-name="Standard" loext:marker-style-name="T6"><text:span text:style-name="Source_20_Text"><text:span text:style-name="T7">plot(t, u, </text:span></text:span><text:span text:style-name="Source_20_Text"><text:span text:style-name="T8">'r'</text:span></text:span><text:span text:style-name="Source_20_Text"><text:span text:style-name="T7">, LineWidth=3)</text:span></text:span></text:p>
      <text:p text:style-name="Standard" loext:marker-style-name="T6"><text:span text:style-name="Source_20_Text"><text:span text:style-name="T7">hold </text:span></text:span><text:span text:style-name="Source_20_Text"><text:span text:style-name="T8">off</text:span></text:span></text:p>
      <text:p text:style-name="Standard" loext:marker-style-name="T6"><text:span text:style-name="Source_20_Text"><text:span text:style-name="T7">xlabel(</text:span></text:span><text:span text:style-name="Source_20_Text"><text:span text:style-name="T8">'Time (s)'</text:span></text:span><text:span text:style-name="Source_20_Text"><text:span text:style-name="T7">)</text:span></text:span></text:p>
      <text:p text:style-name="Standard" loext:marker-style-name="T6"><text:span text:style-name="Source_20_Text"><text:span text:style-name="T7">ylabel(</text:span></text:span><text:span text:style-name="Source_20_Text"><text:span text:style-name="T8">'Amplitude'</text:span></text:span><text:span text:style-name="Source_20_Text"><text:span text:style-name="T7">)</text:span></text:span></text:p>
      <text:p text:style-name="Standard" loext:marker-style-name="T6"><text:span text:style-name="Source_20_Text"><text:span text:style-name="T7">title(</text:span></text:span><text:span text:style-name="Source_20_Text"><text:span text:style-name="T8">'Signal halfed on time axis'</text:span></text:span><text:span text:style-name="Source_20_Text"><text:span text:style-name="T7">)</text:span></text:span></text:p>
      <text:p text:style-name="Standard" loext:marker-style-name="T6"><text:span text:style-name="Source_20_Text"><text:span text:style-name="T7">grid </text:span></text:span><text:span text:style-name="Source_20_Text"><text:span text:style-name="T8">on</text:span></text:span></text:p>
      <text:p text:style-name="Standard" loext:marker-style-name="T6"><text:span text:style-name="Source_20_Text"><text:span text:style-name="T12"/></text:span></text:p>
      <text:p text:style-name="Standard" loext:marker-style-name="T6"><text:span text:style-name="Source_20_Text"><text:span text:style-name="T12"/></text:span></text:p>
      <text:p text:style-name="P8" loext:marker-style-name="T6"><text:span text:style-name="Source_20_Text"><text:span text:style-name="T13"/></text:span></text:p>
      <text:p text:style-name="P9"><text:span text:style-name="Source_20_Text"><text:span text:style-name="T14">For Sine Wave &amp; Derivatives:</text:span></text:span></text:p>
      <text:p text:style-name="Standard" loext:marker-style-name="T6"><text:span text:style-name="Source_20_Text"><text:span text:style-name="T15">clear </text:span></text:span><text:span text:style-name="Source_20_Text"><text:span text:style-name="T16">all</text:span></text:span><text:span text:style-name="Source_20_Text"><text:span text:style-name="T17">;</text:span></text:span></text:p>
      <text:p text:style-name="Standard" loext:marker-style-name="T6"><text:span text:style-name="Source_20_Text"><text:span text:style-name="T17">close </text:span></text:span><text:span text:style-name="Source_20_Text"><text:span text:style-name="T16">all</text:span></text:span><text:span text:style-name="Source_20_Text"><text:span text:style-name="T17">;</text:span></text:span></text:p>
      <text:p text:style-name="Standard" loext:marker-style-name="T6"><text:span text:style-name="Source_20_Text"><text:span text:style-name="T17">clc;</text:span></text:span></text:p>
      <text:p text:style-name="P7" loext:marker-style-name="T6"><text:span text:style-name="Source_20_Text"><text:span text:style-name="T18"/></text:span></text:p>
      <text:p text:style-name="Standard" loext:marker-style-name="T6"><text:span text:style-name="Source_20_Text"><text:span text:style-name="T17">t = -1 : 10^-3 : 1;</text:span></text:span></text:p>
      <text:p text:style-name="P7" loext:marker-style-name="T6"><text:span text:style-name="Source_20_Text"><text:span text:style-name="T18"/></text:span></text:p>
      <text:p text:style-name="Standard" loext:marker-style-name="T6"><text:span text:style-name="Source_20_Text"><text:span text:style-name="T17">signal = sin(2 * pi * t);</text:span></text:span></text:p>
      <text:p text:style-name="Standard" loext:marker-style-name="T6"><text:span text:style-name="Source_20_Text"><text:span text:style-name="T17">signal_plus_2 = sin( 2 * pi * (t + 0.2));</text:span></text:span></text:p>
      <text:p text:style-name="Standard" loext:marker-style-name="T6"><text:span text:style-name="Source_20_Text"><text:span text:style-name="T17">signal_minus_2 = sin( 2 * pi * (t - 0.2));</text:span></text:span></text:p>
      <text:p text:style-name="Standard" loext:marker-style-name="T6"><text:span text:style-name="Source_20_Text"><text:span text:style-name="T17">signal_double = sin(2 * pi * (2*t));</text:span></text:span></text:p>
      <text:p text:style-name="Standard" loext:marker-style-name="T6"><text:span text:style-name="Source_20_Text"><text:span text:style-name="T17">signal_half = sin(2 * pi * (t/2));</text:span></text:span></text:p>
      <text:p text:style-name="Standard" loext:marker-style-name="T6"><text:span text:style-name="Source_20_Text"><text:span text:style-name="T17">signal_reverse = sin( 2 * pi * (-t));</text:span></text:span></text:p>
      <text:p text:style-name="P7" loext:marker-style-name="T6"><text:span text:style-name="Source_20_Text"><text:span text:style-name="T18"/></text:span></text:p>
      <text:p text:style-name="Standard" loext:marker-style-name="T6"><text:span text:style-name="Source_20_Text"><text:span text:style-name="T17">figure;</text:span></text:span></text:p>
      <text:p text:style-name="Standard" loext:marker-style-name="T6"><text:span text:style-name="Source_20_Text"><text:span text:style-name="T17">subplot(3,2,1)</text:span></text:span></text:p>
      <text:p text:style-name="Standard" loext:marker-style-name="T6"><text:span text:style-name="Source_20_Text"><text:span text:style-name="T17">plot(t, signal, </text:span></text:span><text:span text:style-name="Source_20_Text"><text:span text:style-name="T16">'r' </text:span></text:span><text:span text:style-name="Source_20_Text"><text:span text:style-name="T17">,LineWidth=3)</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Original Signal'</text:span></text:span><text:span text:style-name="Source_20_Text"><text:span text:style-name="T17">)</text:span></text:span></text:p>
      <text:p text:style-name="P7" loext:marker-style-name="T6"><text:span text:style-name="Source_20_Text"><text:span text:style-name="T18"/></text:span></text:p>
      <text:p text:style-name="Standard" loext:marker-style-name="T6"><text:span text:style-name="Source_20_Text"><text:span text:style-name="T17">subplot(3,2,2)</text:span></text:span></text:p>
      <text:p text:style-name="Standard" loext:marker-style-name="T6"><text:span text:style-name="Source_20_Text"><text:span text:style-name="T17">plot(t, signal_plus_2, </text:span></text:span><text:span text:style-name="Source_20_Text"><text:span text:style-name="T16">'r'</text:span></text:span><text:span text:style-name="Source_20_Text"><text:span text:style-name="T17">, LineWidth=3)</text:span></text:span></text:p>
      <text:p text:style-name="Standard" loext:marker-style-name="T6"><text:span text:style-name="Source_20_Text"><text:span text:style-name="T17">hold </text:span></text:span><text:span text:style-name="Source_20_Text"><text:span text:style-name="T16">on</text:span></text:span></text:p>
      <text:p text:style-name="Standard" loext:marker-style-name="T6"><text:span text:style-name="Source_20_Text"><text:span text:style-name="T17">plot(t, signal, </text:span></text:span><text:span text:style-name="Source_20_Text"><text:span text:style-name="T16">'m'</text:span></text:span><text:span text:style-name="Source_20_Text"><text:span text:style-name="T17">, LineStyle=</text:span></text:span><text:span text:style-name="Source_20_Text"><text:span text:style-name="T16">'--'</text:span></text:span><text:span text:style-name="Source_20_Text"><text:span text:style-name="T17">)</text:span></text:span></text:p>
      <text:p text:style-name="Standard" loext:marker-style-name="T6"><text:span text:style-name="Source_20_Text"><text:span text:style-name="T17">hold </text:span></text:span><text:span text:style-name="Source_20_Text"><text:span text:style-name="T16">off</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t + 0.2'</text:span></text:span><text:span text:style-name="Source_20_Text"><text:span text:style-name="T17">)</text:span></text:span></text:p>
      <text:p text:style-name="P7" loext:marker-style-name="T6"><text:span text:style-name="Source_20_Text"><text:span text:style-name="T18"/></text:span></text:p>
      <text:p text:style-name="Standard" loext:marker-style-name="T6"><text:span text:style-name="Source_20_Text"><text:span text:style-name="T17">subplot(3,2,3)</text:span></text:span></text:p>
      <text:p text:style-name="Standard" loext:marker-style-name="T6"><text:span text:style-name="Source_20_Text"><text:span text:style-name="T17">plot(t, signal_minus_2, </text:span></text:span><text:span text:style-name="Source_20_Text"><text:span text:style-name="T16">'r'</text:span></text:span><text:span text:style-name="Source_20_Text"><text:span text:style-name="T17">, LineWidth=3)</text:span></text:span></text:p>
      <text:p text:style-name="Standard" loext:marker-style-name="T6"><text:span text:style-name="Source_20_Text"><text:span text:style-name="T17">hold </text:span></text:span><text:span text:style-name="Source_20_Text"><text:span text:style-name="T16">on</text:span></text:span></text:p>
      <text:p text:style-name="Standard" loext:marker-style-name="T6"><text:span text:style-name="Source_20_Text"><text:span text:style-name="T17">plot(t, signal, </text:span></text:span><text:span text:style-name="Source_20_Text"><text:span text:style-name="T16">'m'</text:span></text:span><text:span text:style-name="Source_20_Text"><text:span text:style-name="T17">, LineStyle=</text:span></text:span><text:span text:style-name="Source_20_Text"><text:span text:style-name="T16">'--'</text:span></text:span><text:span text:style-name="Source_20_Text"><text:span text:style-name="T17">)</text:span></text:span></text:p>
      <text:p text:style-name="Standard" loext:marker-style-name="T6"><text:span text:style-name="Source_20_Text"><text:span text:style-name="T17">hold </text:span></text:span><text:span text:style-name="Source_20_Text"><text:span text:style-name="T16">off</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t - 0.2'</text:span></text:span><text:span text:style-name="Source_20_Text"><text:span text:style-name="T17">)</text:span></text:span></text:p>
      <text:p text:style-name="P7" loext:marker-style-name="T6"><text:span text:style-name="Source_20_Text"><text:span text:style-name="T18"/></text:span></text:p>
      <text:p text:style-name="Standard" loext:marker-style-name="T6"><text:span text:style-name="Source_20_Text"><text:span text:style-name="T17">subplot(3,2,4)</text:span></text:span></text:p>
      <text:p text:style-name="Standard" loext:marker-style-name="T6"><text:span text:style-name="Source_20_Text"><text:span text:style-name="T17">plot(t, signal_double, </text:span></text:span><text:span text:style-name="Source_20_Text"><text:span text:style-name="T16">'r'</text:span></text:span><text:span text:style-name="Source_20_Text"><text:span text:style-name="T17">, LineWidth=3)</text:span></text:span></text:p>
      <text:p text:style-name="Standard" loext:marker-style-name="T6"><text:span text:style-name="Source_20_Text"><text:span text:style-name="T17">hold </text:span></text:span><text:span text:style-name="Source_20_Text"><text:span text:style-name="T16">on</text:span></text:span></text:p>
      <text:p text:style-name="Standard" loext:marker-style-name="T6"><text:span text:style-name="Source_20_Text"><text:span text:style-name="T17">plot(t, signal, </text:span></text:span><text:span text:style-name="Source_20_Text"><text:span text:style-name="T16">'m'</text:span></text:span><text:span text:style-name="Source_20_Text"><text:span text:style-name="T17">, LineStyle=</text:span></text:span><text:span text:style-name="Source_20_Text"><text:span text:style-name="T16">'--'</text:span></text:span><text:span text:style-name="Source_20_Text"><text:span text:style-name="T17">)</text:span></text:span></text:p>
      <text:p text:style-name="Standard" loext:marker-style-name="T6"><text:span text:style-name="Source_20_Text"><text:span text:style-name="T17">hold </text:span></text:span><text:span text:style-name="Source_20_Text"><text:span text:style-name="T16">off</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2 x t'</text:span></text:span><text:span text:style-name="Source_20_Text"><text:span text:style-name="T17">)</text:span></text:span></text:p>
      <text:p text:style-name="P7" loext:marker-style-name="T6"><text:span text:style-name="Source_20_Text"><text:span text:style-name="T18"/></text:span></text:p>
      <text:p text:style-name="Standard" loext:marker-style-name="T6"><text:span text:style-name="Source_20_Text"><text:span text:style-name="T17">subplot(3,2,5)</text:span></text:span></text:p>
      <text:p text:style-name="Standard" loext:marker-style-name="T6"><text:soft-page-break/><text:span text:style-name="Source_20_Text"><text:span text:style-name="T17">plot(t, signal_half, </text:span></text:span><text:span text:style-name="Source_20_Text"><text:span text:style-name="T16">'r'</text:span></text:span><text:span text:style-name="Source_20_Text"><text:span text:style-name="T17">, LineWidth=3)</text:span></text:span></text:p>
      <text:p text:style-name="Standard" loext:marker-style-name="T6"><text:span text:style-name="Source_20_Text"><text:span text:style-name="T17">hold </text:span></text:span><text:span text:style-name="Source_20_Text"><text:span text:style-name="T16">on</text:span></text:span></text:p>
      <text:p text:style-name="Standard" loext:marker-style-name="T6"><text:span text:style-name="Source_20_Text"><text:span text:style-name="T17">plot(t, signal, </text:span></text:span><text:span text:style-name="Source_20_Text"><text:span text:style-name="T16">'m'</text:span></text:span><text:span text:style-name="Source_20_Text"><text:span text:style-name="T17">, LineStyle=</text:span></text:span><text:span text:style-name="Source_20_Text"><text:span text:style-name="T16">'--'</text:span></text:span><text:span text:style-name="Source_20_Text"><text:span text:style-name="T17">)</text:span></text:span></text:p>
      <text:p text:style-name="Standard" loext:marker-style-name="T6"><text:span text:style-name="Source_20_Text"><text:span text:style-name="T17">hold </text:span></text:span><text:span text:style-name="Source_20_Text"><text:span text:style-name="T16">off</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t / 2'</text:span></text:span><text:span text:style-name="Source_20_Text"><text:span text:style-name="T17">)</text:span></text:span></text:p>
      <text:p text:style-name="P7" loext:marker-style-name="T6"><text:span text:style-name="Source_20_Text"><text:span text:style-name="T18"/></text:span></text:p>
      <text:p text:style-name="Standard" loext:marker-style-name="T6"><text:span text:style-name="Source_20_Text"><text:span text:style-name="T17">subplot(3,2,6)</text:span></text:span></text:p>
      <text:p text:style-name="Standard" loext:marker-style-name="T6"><text:span text:style-name="Source_20_Text"><text:span text:style-name="T17">plot(t, signal_reverse, </text:span></text:span><text:span text:style-name="Source_20_Text"><text:span text:style-name="T16">'r'</text:span></text:span><text:span text:style-name="Source_20_Text"><text:span text:style-name="T17">, LineWidth=3)</text:span></text:span></text:p>
      <text:p text:style-name="Standard" loext:marker-style-name="T6"><text:span text:style-name="Source_20_Text"><text:span text:style-name="T17">hold </text:span></text:span><text:span text:style-name="Source_20_Text"><text:span text:style-name="T16">on</text:span></text:span></text:p>
      <text:p text:style-name="Standard" loext:marker-style-name="T6"><text:span text:style-name="Source_20_Text"><text:span text:style-name="T17">plot(t, signal, </text:span></text:span><text:span text:style-name="Source_20_Text"><text:span text:style-name="T16">'m'</text:span></text:span><text:span text:style-name="Source_20_Text"><text:span text:style-name="T17">, LineStyle=</text:span></text:span><text:span text:style-name="Source_20_Text"><text:span text:style-name="T16">'--'</text:span></text:span><text:span text:style-name="Source_20_Text"><text:span text:style-name="T17">)</text:span></text:span></text:p>
      <text:p text:style-name="Standard" loext:marker-style-name="T6"><text:span text:style-name="Source_20_Text"><text:span text:style-name="T17">hold </text:span></text:span><text:span text:style-name="Source_20_Text"><text:span text:style-name="T16">off</text:span></text:span></text:p>
      <text:p text:style-name="Standard" loext:marker-style-name="T6"><text:span text:style-name="Source_20_Text"><text:span text:style-name="T17">grid </text:span></text:span><text:span text:style-name="Source_20_Text"><text:span text:style-name="T16">on</text:span></text:span><text:span text:style-name="Source_20_Text"><text:span text:style-name="T17">;</text:span></text:span></text:p>
      <text:p text:style-name="Standard" loext:marker-style-name="T6"><text:span text:style-name="Source_20_Text"><text:span text:style-name="T17">title(</text:span></text:span><text:span text:style-name="Source_20_Text"><text:span text:style-name="T16">'Signal Reverse'</text:span></text:span><text:span text:style-name="Source_20_Text"><text:span text:style-name="T17">)</text:span></text:span></text:p>
      <text:p text:style-name="P7" loext:marker-style-name="T6"><text:span text:style-name="Source_20_Text"><text:span text:style-name="T19"/></text:span></text:p>
      <text:p text:style-name="P7" loext:marker-style-name="T6"><text:span text:style-name="Source_20_Text"><text:span text:style-name="T19"/></text:span></text:p>
      <text:p text:style-name="P10"><text:span text:style-name="Source_20_Text"><text:span text:style-name="T20"/></text:span></text:p>
      <text:p text:style-name="P9"><text:span text:style-name="Source_20_Text"><text:span text:style-name="T14"/></text:span></text:p>
      <text:p text:style-name="P9"><text:span text:style-name="Source_20_Text"><text:span text:style-name="T14"/></text:span></text:p>
      <text:p text:style-name="P9"/>
      <text:p text:style-name="P9"><text:span text:style-name="Source_20_Text"><text:span text:style-name="T14"/></text:span></text:p>
      <text:p text:style-name="P9"><text:span text:style-name="Source_20_Text"><text:span text:style-name="T14"/></text:span></text:p>
      <text:p text:style-name="P9"><text:span text:style-name="Source_20_Text"><text:span text:style-name="T14"/></text:span></text:p>
      <text:h text:style-name="P11" text:outline-level="1"><text:span text:style-name="Source_20_Text"><text:span text:style-name="T21">Result</text:span></text:span><text:span text:style-name="Source_20_Text"><text:span text:style-name="T22">s:</text:span></text:span></text:h>
      <text:p text:style-name="P12"><draw:frame draw:style-name="fr1" draw:name="Image1" text:anchor-type="char" svg:x="-1.314cm" svg:y="1.071cm" svg:width="28.254cm" svg:height="14.776cm" draw:z-index="0"><draw:image xlink:href="Pictures/10000001000007DC000003DE0CD63591.png" xlink:type="simple" xlink:show="embed" xlink:actuate="onLoad" draw:mime-type="image/png"/></draw:frame><text:span text:style-name="Source_20_Text"><text:span text:style-name="T23">Unit Step Signal and derivatives</text:span></text:span></text:p>
      <text:p text:style-name="P13"><text:soft-page-break/><text:span text:style-name="Source_20_Text"><text:span text:style-name="T24"/></text:span></text:p>
      <text:p text:style-name="P13"><text:span text:style-name="Source_20_Text"><text:span text:style-name="T24"/></text:span></text:p>
      <text:p text:style-name="P13"><draw:frame draw:style-name="fr1" draw:name="Image2" text:anchor-type="char" svg:x="-1.459cm" svg:y="0.857cm" svg:width="28.7cm" svg:height="13.801cm" draw:z-index="1"><draw:image xlink:href="Pictures/10000001000007C7000003BD096BABDC.png" xlink:type="simple" xlink:show="embed" xlink:actuate="onLoad" draw:mime-type="image/png"/></draw:frame><text:span text:style-name="Source_20_Text"><text:span text:style-name="T25">Sine Wave &amp; Derivatives:</text:span></text:span><text:span text:style-name="Source_20_Text"><text:span text:style-name="T26"><text:tab/><text:tab/><text:tab/><text:tab/><text:tab/><text:tab/><text:tab/><text:tab/><text:tab/><text:tab/><text:tab/><text:tab/><text:tab/><text:tab/><text:tab/><text:tab/><text:tab/><text:tab/><text:tab/></text:span></text:span></text:p>
      <text:h text:style-name="P14" text:outline-level="1"><text:span text:style-name="Source_20_Text"><text:span text:style-name="T27">Conclusions:</text:span></text:span></text:h>
      <text:p text:style-name="P13"><text:span text:style-name="Source_20_Text"><text:span text:style-name="T24">From this experiment, we were able to plot and illustrate how time-shifting, time-scaling and time-reversal for both a sine wave and for a unit step signal. We also note that the maximum amplitude through the signal did not change while performing these transformations. We are clearly able to see the shifts, scaling and reversals as compared to the original signal in the dotted magenta lin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1:22:25.713292186</meta:creation-date>
    <meta:editing-duration>PT13H4M39S</meta:editing-duration>
    <meta:editing-cycles>4</meta:editing-cycles>
    <meta:generator>LibreOffice/25.8.3.2$Linux_X86_64 LibreOffice_project/580$Build-2</meta:generator>
    <dc:date>2026-01-26T23:48:55.238609493</dc:date>
    <meta:print-date>2026-01-23T11:26:52.107126863</meta:print-date>
    <meta:printed-by>PDF files</meta:printed-by>
    <meta:document-statistic meta:table-count="0" meta:image-count="2" meta:object-count="0" meta:page-count="7" meta:paragraph-count="166" meta:word-count="682" meta:character-count="4123" meta:non-whitespace-character-count="3431"/>
  </office:meta>
</office:document-meta>
</file>