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E1000003DEA91CAF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 style:font-family-generic="roman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db16" officeooo:paragraph-rsid="000b5dfe" style:font-size-asian="14pt" style:font-size-complex="14pt"/>
    </style:style>
    <style:style style:name="P2" style:family="paragraph" style:parent-style-name="Standard">
      <style:text-properties officeooo:rsid="0004db16" officeooo:paragraph-rsid="000b5dfe"/>
    </style:style>
    <style:style style:name="P3" style:family="paragraph" style:parent-style-name="Standard">
      <style:text-properties style:font-name="Liberation Serif" officeooo:rsid="0004db16" officeooo:paragraph-rsid="0004db16"/>
    </style:style>
    <style:style style:name="P4" style:family="paragraph" style:parent-style-name="Standard">
      <style:text-properties style:font-name="Liberation Serif" fo:font-weight="bold" officeooo:rsid="0004db16" officeooo:paragraph-rsid="0004db16" style:font-weight-asian="bold" style:font-weight-complex="bold"/>
    </style:style>
    <style:style style:name="P5" style:family="paragraph" style:parent-style-name="Standard">
      <style:text-properties officeooo:paragraph-rsid="0004db16"/>
    </style:style>
    <style:style style:name="P6" style:family="paragraph" style:parent-style-name="Standard">
      <style:text-properties officeooo:rsid="0004db16" officeooo:paragraph-rsid="000613b1"/>
    </style:style>
    <style:style style:name="P7" style:family="paragraph" style:parent-style-name="Standard">
      <style:text-properties style:font-name="Liberation Serif" officeooo:rsid="000613b1" officeooo:paragraph-rsid="000613b1" style:font-name-asian="Liberation Serif" style:font-name-complex="Liberation Serif"/>
    </style:style>
    <style:style style:name="P8" style:family="paragraph" style:parent-style-name="Standard">
      <style:text-properties style:font-name="Liberation Serif" officeooo:rsid="000613b1" officeooo:paragraph-rsid="00081a4d" style:font-name-asian="Liberation Serif" style:font-name-complex="Liberation Serif"/>
    </style:style>
    <style:style style:name="P9" style:family="paragraph" style:parent-style-name="Standard">
      <style:text-properties style:font-name="Liberation Serif" fo:font-weight="bold" officeooo:rsid="000a2d1e" officeooo:paragraph-rsid="000a2d1e" style:font-name-asian="Liberation Serif" style:font-weight-asian="bold" style:font-name-complex="Liberation Serif" style:font-weight-complex="bold"/>
    </style:style>
    <style:style style:name="P10" style:family="paragraph" style:parent-style-name="Standard">
      <style:text-properties style:font-name="0" fo:font-size="10pt" style:font-size-asian="10pt"/>
    </style:style>
    <style:style style:name="P11" style:family="paragraph" style:parent-style-name="Standard">
      <style:text-properties style:font-name="Hack" officeooo:rsid="000613b1" officeooo:paragraph-rsid="00081a4d" style:font-name-asian="Liberation Serif" style:font-name-complex="Liberation Serif"/>
    </style:style>
    <style:style style:name="P12" style:family="paragraph" style:parent-style-name="Standard">
      <style:text-properties style:font-name="Liberation Serif1" fo:font-weight="bold" officeooo:rsid="000a2d1e" officeooo:paragraph-rsid="000a2d1e" style:font-name-asian="Liberation Serif" style:font-weight-asian="bold" style:font-name-complex="Liberation Serif" style:font-weight-complex="bold"/>
    </style:style>
    <style:style style:name="P13" style:family="paragraph" style:parent-style-name="Standard">
      <style:text-properties style:font-name="Liberation Serif1" officeooo:rsid="000a2d1e" officeooo:paragraph-rsid="000a2d1e" style:font-name-asian="Liberation Serif" style:font-name-complex="Liberation Serif"/>
    </style:style>
    <style:style style:name="P14" style:family="paragraph" style:parent-style-name="Standard">
      <style:text-properties style:font-name="Liberation Serif" officeooo:rsid="000613b1" officeooo:paragraph-rsid="00069ea0" style:font-name-asian="Liberation Serif" style:font-name-complex="Liberation Serif"/>
    </style:style>
    <style:style style:name="P15" style:family="paragraph" style:parent-style-name="Standard">
      <style:text-properties style:font-name="Liberation Serif" fo:font-weight="bold" officeooo:rsid="000b5dfe" officeooo:paragraph-rsid="000b5dfe" style:font-name-asian="Liberation Serif" style:font-weight-asian="bold" style:font-name-complex="Liberation Serif" style:font-weight-complex="bold"/>
    </style:style>
    <style:style style:name="P16" style:family="paragraph" style:parent-style-name="Standard">
      <style:text-properties style:font-name="Liberation Serif" fo:font-weight="normal" officeooo:rsid="000b5dfe" officeooo:paragraph-rsid="000b5dfe" style:font-name-asian="Liberation Serif" style:font-weight-asian="normal" style:font-name-complex="Liberation Serif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e031"/>
    </style:style>
    <style:style style:name="T3" style:family="text">
      <style:text-properties style:font-name="Liberation Seri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officeooo:rsid="0004db16"/>
    </style:style>
    <style:style style:name="T6" style:family="text">
      <style:text-properties officeooo:rsid="000613b1"/>
    </style:style>
    <style:style style:name="T7" style:family="text">
      <style:text-properties style:font-name="Liberation Serif" officeooo:rsid="000613b1"/>
    </style:style>
    <style:style style:name="T8" style:family="text">
      <style:text-properties style:font-name="Liberation Serif1" officeooo:rsid="000613b1"/>
    </style:style>
    <style:style style:name="T9" style:family="text">
      <style:text-properties officeooo:rsid="000613b1" style:font-name-asian="Liberation Serif" style:font-name-complex="Liberation Serif"/>
    </style:style>
    <style:style style:name="T10" style:family="text">
      <style:text-properties style:font-name="Liberation Serif" officeooo:rsid="000613b1" style:font-name-asian="Liberation Serif" style:font-name-complex="Liberation Serif"/>
    </style:style>
    <style:style style:name="T11" style:family="text">
      <style:text-properties officeooo:rsid="00069ea0"/>
    </style:style>
    <style:style style:name="T12" style:family="text">
      <style:text-properties style:font-name="0" fo:font-size="10pt" style:font-size-asian="10pt"/>
    </style:style>
    <style:style style:name="T13" style:family="text">
      <style:text-properties fo:color="#000000" loext:opacity="100%" style:font-name="0" fo:font-size="10pt" style:font-size-asian="10pt"/>
    </style:style>
    <style:style style:name="T14" style:family="text">
      <style:text-properties fo:color="#a709f5" loext:opacity="100%" style:font-name="0" fo:font-size="10pt" style:font-size-asian="10pt"/>
    </style:style>
    <style:style style:name="T15" style:family="text">
      <style:text-properties fo:color="#008013" loext:opacity="100%" style:font-name="0" fo:font-size="10pt" style:font-size-asian="10pt"/>
    </style:style>
    <style:style style:name="T16" style:family="text">
      <style:text-properties fo:color="#000000" loext:opacity="100%" style:font-name="0" fo:font-size="10pt" officeooo:rsid="000ce031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</text:span>: </text:p>
      <text:p text:style-name="P2">Writing a MATLAB program to plot exactly 10 cycles of a cosine signal <text:span text:style-name="T2">with a </text:span>frequency of 500 Hz, maximum amplitude of 5V and constant phase of <text:span text:style-name="T3">π / 4</text:span></text:p>
      <text:p text:style-name="P3"/>
      <text:p text:style-name="P4"><text:span text:style-name="T4">Theory</text:span>:</text:p>
      <text:p text:style-name="P3"/>
      <text:p text:style-name="P3">We know that a cosine signal function is a periodic waveform described by <text:line-break/></text:p>
      <text:p text:style-name="P5">x(t)=A<text:span text:style-name="T5">·</text:span>cos(2πft + ϕ)</text:p>
      <text:p text:style-name="P5"/>
      <text:p text:style-name="P6">Where A is the amplitude, f is the frequency in Hertz, t is time in seconds, and ϕ is the phase shift in radians. <text:span text:style-name="T6">Here, A = 5V sets the value of the maximum voltage, f = 500 Hz determines the oscillation rate, and <text:s/></text:span>ϕ <text:span text:style-name="T6">= </text:span><text:span text:style-name="T7">π</text:span><text:span text:style-name="T8">/4 shifts the waveform right by 1/4 of a cycle. Since we get 500 Hz as the oscillation rate T = 1/f = 2</text:span><text:span text:style-name="T7">·</text:span><text:span text:style-name="T8">10</text:span><text:span text:style-name="T9">⁻</text:span><text:span text:style-name="T10">³ seconds.</text:span></text:p>
      <text:p text:style-name="P7"/>
      <text:p text:style-name="P8">In MATLAB, <text:span text:style-name="T11">we will emulate a continuous signal by creating small increments in time (Δt) at the magnitude of 10</text:span>⁻<text:span text:style-name="T11">⁶.</text:span></text:p>
      <text:p text:style-name="P8"/>
      <text:p text:style-name="P9"><text:span text:style-name="T4">MATLAB Code</text:span>:</text:p>
      <text:p text:style-name="P9"/>
      <text:p text:style-name="P9"/>
      <text:p text:style-name="Standard" loext:marker-style-name="T12"><text:span text:style-name="T13">clc;</text:span></text:p>
      <text:p text:style-name="Standard" loext:marker-style-name="T12"><text:span text:style-name="T13">clear </text:span><text:span text:style-name="T14">all</text:span><text:span text:style-name="T13">; </text:span><text:span text:style-name="T15">% clear</text:span></text:p>
      <text:p text:style-name="Standard" loext:marker-style-name="T12"><text:span text:style-name="T13">close </text:span><text:span text:style-name="T14">all</text:span><text:span text:style-name="T13">;</text:span></text:p>
      <text:p text:style-name="P10" loext:marker-style-name="T12"/>
      <text:p text:style-name="Standard" loext:marker-style-name="T12"><text:span text:style-name="T15">% cos Wave Signal</text:span><text:span text:style-name="T15"/></text:p>
      <text:p text:style-name="P10" loext:marker-style-name="T12"/>
      <text:p text:style-name="Standard" loext:marker-style-name="T12"><text:span text:style-name="T13">f = 500</text:span><text:span text:style-name="T13"/></text:p>
      <text:p text:style-name="Standard" loext:marker-style-name="T12"><text:span text:style-name="T13">T = 1/f; </text:span><text:span text:style-name="T15">% Declare Variables</text:span></text:p>
      <text:p text:style-name="Standard" loext:marker-style-name="T12"><text:span text:style-name="T13">t = 0:10^-6:</text:span><text:span text:style-name="T16">10</text:span><text:span text:style-name="T13">*T;</text:span></text:p>
      <text:p text:style-name="P10" loext:marker-style-name="T12"/>
      <text:p text:style-name="Standard" loext:marker-style-name="T12"><text:span text:style-name="T13">signal = 5*cos(2*pi*f*t + (pi/4)); </text:span><text:span text:style-name="T15">% Obtain Signal</text:span></text:p>
      <text:p text:style-name="P10" loext:marker-style-name="T12"/>
      <text:p text:style-name="Standard" loext:marker-style-name="T12"><text:span text:style-name="T13">plot(t,signal, </text:span><text:span text:style-name="T14">'r'</text:span><text:span text:style-name="T13">, LineWidth=2) </text:span><text:span text:style-name="T15">% Plot signal</text:span></text:p>
      <text:p text:style-name="Standard" loext:marker-style-name="T12"><text:span text:style-name="T13">xlabel(</text:span><text:span text:style-name="T14">'Time (s)'</text:span><text:span text:style-name="T13">)</text:span></text:p>
      <text:p text:style-name="Standard" loext:marker-style-name="T12"><text:span text:style-name="T13">ylabel(</text:span><text:span text:style-name="T14">'Amplitude'</text:span><text:span text:style-name="T13">)</text:span></text:p>
      <text:p text:style-name="Standard" loext:marker-style-name="T12"><text:span text:style-name="T13">title(</text:span><text:span text:style-name="T14">'Cosine wave signal'</text:span><text:span text:style-name="T13">)</text:span></text:p>
      <text:p text:style-name="Standard" loext:marker-style-name="T12"><text:span text:style-name="T13">grid </text:span><text:span text:style-name="T14">on</text:span><text:span text:style-name="T13">;</text:span></text:p>
      <text:p text:style-name="P11"/>
      <text:p text:style-name="P11"/>
      <text:p text:style-name="P12"><text:span text:style-name="T4">Results</text:span>:</text:p>
      <text:p text:style-name="P13"/>
      <text:p text:style-name="P13"><draw:frame draw:style-name="fr1" draw:name="Image1" text:anchor-type="char" svg:width="12.345cm" svg:height="6.054cm" draw:z-index="0"><draw:image xlink:href="Pictures/10000001000007E1000003DEA91CAFD3.png" xlink:type="simple" xlink:show="embed" xlink:actuate="onLoad" draw:mime-type="image/png"/></draw:frame></text:p>
      <text:p text:style-name="P8"/>
      <text:p text:style-name="P8"/>
      <text:p text:style-name="P8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<text:span text:style-name="T4">Conculsion</text:span>:</text:p>
      <text:p text:style-name="P15"/>
      <text:p text:style-name="P16">From this experiment we were able to plot and visualize 10 cycles of a cosine signal with phase difference of π/4 and a maximum amplitude of 5V in MATLAB. In MATLAB, we were able to make a smooth visualization via using a small time sample to prevent alias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 style:font-family-generic="roman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22:09:10.727439078</meta:creation-date>
    <dc:date>2026-01-16T19:56:34.330777350</dc:date>
    <meta:editing-duration>PT17M19S</meta:editing-duration>
    <meta:editing-cycles>3</meta:editing-cycles>
    <meta:generator>LibreOffice/25.8.3.2$Linux_X86_64 LibreOffice_project/580$Build-2</meta:generator>
    <meta:print-date>2026-01-16T19:52:09.397748783</meta:print-date>
    <meta:printed-by>PDF files</meta:printed-by>
    <meta:document-statistic meta:table-count="0" meta:image-count="1" meta:object-count="0" meta:page-count="2" meta:paragraph-count="25" meta:word-count="239" meta:character-count="1269" meta:non-whitespace-character-count="1051"/>
  </office:meta>
</office:document-meta>
</file>